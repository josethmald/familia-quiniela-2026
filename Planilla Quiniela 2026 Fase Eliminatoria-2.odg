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1000003C58244125D.jpg" manifest:media-type="image/jpeg"/>
  <manifest:file-entry manifest:full-path="Pictures/1000000000000351000003C52DF21F10.jpg" manifest:media-type="image/jpeg"/>
  <manifest:file-entry manifest:full-path="Pictures/100000010000057100000447E6E43B5F.png" manifest:media-type="image/png"/>
  <manifest:file-entry manifest:full-path="Pictures/10000000000002DB0000043AA241C0FC.jpg" manifest:media-type="image/jpeg"/>
  <manifest:file-entry manifest:full-path="Pictures/1000000000000351000003C58F8CDAC6.jpg" manifest:media-type="image/jpeg"/>
  <manifest:file-entry manifest:full-path="Pictures/1000000000000031000000019B823F53.png" manifest:media-type="image/png"/>
  <manifest:file-entry manifest:full-path="Pictures/1000000000000040000000015CBD3BA6.png" manifest:media-type="image/png"/>
  <manifest:file-entry manifest:full-path="Pictures/100000000000000100000001246D66CC.png" manifest:media-type="image/png"/>
  <manifest:file-entry manifest:full-path="Pictures/100000000000005500000001AF26F9D5.png" manifest:media-type="image/png"/>
  <manifest:file-entry manifest:full-path="Pictures/1000000000000038000000010EE93C94.png" manifest:media-type="image/png"/>
  <manifest:file-entry manifest:full-path="Pictures/100000000000005500000001DF9AC24C.png" manifest:media-type="image/png"/>
  <manifest:file-entry manifest:full-path="Pictures/1000000000000055000000015FB1E9F8.png" manifest:media-type="image/png"/>
  <manifest:file-entry manifest:full-path="Pictures/1000000000000055000000016BFCEBB8.png" manifest:media-type="image/png"/>
  <manifest:file-entry manifest:full-path="Pictures/1000000000000055000000019DB1A4E0.png" manifest:media-type="image/png"/>
  <manifest:file-entry manifest:full-path="Pictures/100000000000004D00000001BF9B57FA.png" manifest:media-type="image/png"/>
  <manifest:file-entry manifest:full-path="Pictures/1000000000000055000000019C502B48.png" manifest:media-type="image/png"/>
  <manifest:file-entry manifest:full-path="Pictures/10000000000000550000000178E0AA6E.png" manifest:media-type="image/png"/>
  <manifest:file-entry manifest:full-path="Pictures/10000000000000550000000144CC0279.png" manifest:media-type="image/png"/>
  <manifest:file-entry manifest:full-path="Pictures/1000000000000055000000012787F1EB.png" manifest:media-type="image/png"/>
  <manifest:file-entry manifest:full-path="Pictures/100000000000005500000001315C948B.png" manifest:media-type="image/png"/>
  <manifest:file-entry manifest:full-path="Pictures/10000000000000540000000116BE5C62.png" manifest:media-type="image/png"/>
  <manifest:file-entry manifest:full-path="Pictures/10000000000000480000000184957F6D.png" manifest:media-type="image/png"/>
  <manifest:file-entry manifest:full-path="Pictures/1000000000000055000000011336B745.png" manifest:media-type="image/png"/>
  <manifest:file-entry manifest:full-path="Pictures/100000000000004E00000001277F5F0C.png" manifest:media-type="image/png"/>
  <manifest:file-entry manifest:full-path="Pictures/100000000000005500000001963F57DA.png" manifest:media-type="image/png"/>
  <manifest:file-entry manifest:full-path="Pictures/100000000000004F00000001E8534CD3.png" manifest:media-type="image/png"/>
  <manifest:file-entry manifest:full-path="Pictures/10000000000000020000000103A708D2.png" manifest:media-type="image/png"/>
  <manifest:file-entry manifest:full-path="Pictures/100000000000004F00000001A24F274B.png" manifest:media-type="image/png"/>
  <manifest:file-entry manifest:full-path="Pictures/100000000000005500000001E774B5F6.png" manifest:media-type="image/png"/>
  <manifest:file-entry manifest:full-path="Pictures/1000000000000055000000018771FF1D.png" manifest:media-type="image/png"/>
  <manifest:file-entry manifest:full-path="Pictures/1000000000000047000000018B13E1B4.png" manifest:media-type="image/png"/>
  <manifest:file-entry manifest:full-path="Pictures/1000000000000010000000011AEC788C.png" manifest:media-type="image/png"/>
  <manifest:file-entry manifest:full-path="Pictures/100000000000004C00000001E37F7596.png" manifest:media-type="image/png"/>
  <manifest:file-entry manifest:full-path="Pictures/100000000000004F00000001CE4F4DD5.png" manifest:media-type="image/png"/>
  <manifest:file-entry manifest:full-path="Pictures/100000000000005500000001124684F8.png" manifest:media-type="image/png"/>
  <manifest:file-entry manifest:full-path="Pictures/100000000000004E000000011017A80B.png" manifest:media-type="image/png"/>
  <manifest:file-entry manifest:full-path="Pictures/10000000000000540000000151887E0F.png" manifest:media-type="image/png"/>
  <manifest:file-entry manifest:full-path="Pictures/100000000000004F00000001F466C5E5.png" manifest:media-type="image/png"/>
  <manifest:file-entry manifest:full-path="Pictures/1000000000000049000000012229C98A.png" manifest:media-type="image/png"/>
  <manifest:file-entry manifest:full-path="Pictures/1000000000000055000000017106662A.png" manifest:media-type="image/png"/>
  <manifest:file-entry manifest:full-path="Pictures/100000000000005000000001121B5203.png" manifest:media-type="image/png"/>
  <manifest:file-entry manifest:full-path="Pictures/10000000000000550000000104CD73A5.png" manifest:media-type="image/png"/>
  <manifest:file-entry manifest:full-path="Pictures/100000000000004B00000001ACC2F3B2.png" manifest:media-type="image/png"/>
  <manifest:file-entry manifest:full-path="Pictures/100000000000004F0000000199687642.png" manifest:media-type="image/png"/>
  <manifest:file-entry manifest:full-path="Pictures/1000000000000050000000011ADC2445.png" manifest:media-type="image/png"/>
  <manifest:file-entry manifest:full-path="Pictures/10000000000000550000000176A443FC.png" manifest:media-type="image/png"/>
  <manifest:file-entry manifest:full-path="Pictures/100000000000004300000001450F14AB.png" manifest:media-type="image/png"/>
  <manifest:file-entry manifest:full-path="Pictures/100000000000004300000001180867AF.png" manifest:media-type="image/png"/>
  <manifest:file-entry manifest:full-path="Pictures/100000000000004C000000016193D368.png" manifest:media-type="image/png"/>
  <manifest:file-entry manifest:full-path="Pictures/100000000000005200000001628B97B1.png" manifest:media-type="image/png"/>
  <manifest:file-entry manifest:full-path="Pictures/100000000000004300000001047321CC.png" manifest:media-type="image/png"/>
  <manifest:file-entry manifest:full-path="Pictures/100000000000004A0000000141ECB810.png" manifest:media-type="image/png"/>
  <manifest:file-entry manifest:full-path="Pictures/100000000000004D00000001D25C5A6F.png" manifest:media-type="image/png"/>
  <manifest:file-entry manifest:full-path="Pictures/10000000000000500000000176C81FF2.png" manifest:media-type="image/png"/>
  <manifest:file-entry manifest:full-path="Pictures/1000000000000055000000018ABA7881.png" manifest:media-type="image/png"/>
  <manifest:file-entry manifest:full-path="Pictures/100000000000004800000001315514D0.png" manifest:media-type="image/png"/>
  <manifest:file-entry manifest:full-path="Pictures/1000000000000055000000014966A683.png" manifest:media-type="image/png"/>
  <manifest:file-entry manifest:full-path="Pictures/1000000000000052000000014F36A778.png" manifest:media-type="image/png"/>
  <manifest:file-entry manifest:full-path="Pictures/100000000000005000000001BC612413.png" manifest:media-type="image/png"/>
  <manifest:file-entry manifest:full-path="Pictures/10000000000000510000000160F66ED4.png" manifest:media-type="image/png"/>
  <manifest:file-entry manifest:full-path="Pictures/1000000000000052000000015D9F0879.png" manifest:media-type="image/png"/>
  <manifest:file-entry manifest:full-path="Pictures/100000000000005300000001B3C10AE4.png" manifest:media-type="image/png"/>
  <manifest:file-entry manifest:full-path="Pictures/100000000000003D000000014334297F.png" manifest:media-type="image/png"/>
  <manifest:file-entry manifest:full-path="Pictures/100000000000005000000001473100FB.png" manifest:media-type="image/png"/>
  <manifest:file-entry manifest:full-path="Pictures/100000000000003C0000000135495BFE.png" manifest:media-type="image/png"/>
  <manifest:file-entry manifest:full-path="Pictures/100000000000004A00000001D5978C6A.png" manifest:media-type="image/png"/>
  <manifest:file-entry manifest:full-path="Pictures/1000000000000055000000019B554C41.png" manifest:media-type="image/png"/>
  <manifest:file-entry manifest:full-path="Pictures/100000000000005500000001ECC09333.png" manifest:media-type="image/png"/>
  <manifest:file-entry manifest:full-path="Pictures/100000000000004A0000000165EBE7BF.png" manifest:media-type="image/png"/>
  <manifest:file-entry manifest:full-path="Pictures/100000000000003C000000017331A33D.png" manifest:media-type="image/png"/>
  <manifest:file-entry manifest:full-path="Pictures/100000000000004C0000000181E70B0E.png" manifest:media-type="image/png"/>
  <manifest:file-entry manifest:full-path="Pictures/100000000000004D000000010FF9EBDA.png" manifest:media-type="image/png"/>
  <manifest:file-entry manifest:full-path="Pictures/100000000000005100000001F318FF3E.png" manifest:media-type="image/png"/>
  <manifest:file-entry manifest:full-path="Pictures/100000000000005500000001F21F24A6.png" manifest:media-type="image/png"/>
  <manifest:file-entry manifest:full-path="Pictures/100000000000005500000001307A552F.png" manifest:media-type="image/png"/>
  <manifest:file-entry manifest:full-path="Pictures/1000000000000032000000012A8244D0.png" manifest:media-type="image/png"/>
  <manifest:file-entry manifest:full-path="Pictures/100000000000002F000000018266D0E1.png" manifest:media-type="image/png"/>
  <manifest:file-entry manifest:full-path="Pictures/10000000000000500000000163F35504.png" manifest:media-type="image/png"/>
  <manifest:file-entry manifest:full-path="Pictures/100000000000005300000001C171D97C.png" manifest:media-type="image/png"/>
  <manifest:file-entry manifest:full-path="Pictures/100000000000004C00000001C6AD5D63.png" manifest:media-type="image/png"/>
  <manifest:file-entry manifest:full-path="Pictures/1000000000000046000000017EDEF60B.png" manifest:media-type="image/png"/>
  <manifest:file-entry manifest:full-path="Pictures/10000000000000550000000130CC98BD.png" manifest:media-type="image/png"/>
  <manifest:file-entry manifest:full-path="Pictures/100000000000005400000001DF940C69.png" manifest:media-type="image/png"/>
  <manifest:file-entry manifest:full-path="Pictures/100000000000004C00000001741BB5AC.png" manifest:media-type="image/png"/>
  <manifest:file-entry manifest:full-path="Pictures/1000000000000049000000014513A830.png" manifest:media-type="image/png"/>
  <manifest:file-entry manifest:full-path="Pictures/100000000000004E0000000117B9C9BD.png" manifest:media-type="image/png"/>
  <manifest:file-entry manifest:full-path="Pictures/10000000000000550000000190F70A9D.png" manifest:media-type="image/png"/>
  <manifest:file-entry manifest:full-path="Pictures/10000000000000440000000178447203.png" manifest:media-type="image/png"/>
  <manifest:file-entry manifest:full-path="Pictures/100000000000004D0000000134C4441E.png" manifest:media-type="image/png"/>
  <manifest:file-entry manifest:full-path="Pictures/100000000000004E0000000165FF1DF3.png" manifest:media-type="image/png"/>
  <manifest:file-entry manifest:full-path="Pictures/1000000000000040000000018BFF08F2.png" manifest:media-type="image/png"/>
  <manifest:file-entry manifest:full-path="Pictures/100000000000005500000001B3D62835.png" manifest:media-type="image/png"/>
  <manifest:file-entry manifest:full-path="Pictures/100000000000004F00000001C3A4469A.png" manifest:media-type="image/png"/>
  <manifest:file-entry manifest:full-path="Pictures/100000000000005500000001EB6D73A7.png" manifest:media-type="image/png"/>
  <manifest:file-entry manifest:full-path="Pictures/10000000000000550000000159AC89E8.png" manifest:media-type="image/png"/>
  <manifest:file-entry manifest:full-path="Pictures/100000000000004D0000000182F6B0F5.png" manifest:media-type="image/png"/>
  <manifest:file-entry manifest:full-path="Pictures/10000000000000550000000174A2AB2C.png" manifest:media-type="image/png"/>
  <manifest:file-entry manifest:full-path="Pictures/10000000000000110000000116313D80.png" manifest:media-type="image/png"/>
  <manifest:file-entry manifest:full-path="Pictures/1000000000000047000000017E6133AE.png" manifest:media-type="image/png"/>
  <manifest:file-entry manifest:full-path="Pictures/1000000000000055000000010FE82D5D.png" manifest:media-type="image/png"/>
  <manifest:file-entry manifest:full-path="Pictures/100000000000003800000001112BC7BE.png" manifest:media-type="image/png"/>
  <manifest:file-entry manifest:full-path="Pictures/1000000000000055000000017D7BD419.png" manifest:media-type="image/png"/>
  <manifest:file-entry manifest:full-path="Pictures/100000000000000100000001177F5D20.png" manifest:media-type="image/png"/>
  <manifest:file-entry manifest:full-path="Pictures/1000000000000040000000013A89581D.png" manifest:media-type="image/png"/>
  <manifest:file-entry manifest:full-path="Pictures/100000000000004B000000010684FE34.png" manifest:media-type="image/png"/>
  <manifest:file-entry manifest:full-path="Pictures/100000000000001100000001EBBBD482.png" manifest:media-type="image/png"/>
  <manifest:file-entry manifest:full-path="Pictures/100000000000004B00000001BC8D0D55.png" manifest:media-type="image/png"/>
  <manifest:file-entry manifest:full-path="Pictures/1000000000000052000000015804194F.png" manifest:media-type="image/png"/>
  <manifest:file-entry manifest:full-path="Pictures/100000000000004B000000012DB4288A.png" manifest:media-type="image/png"/>
  <manifest:file-entry manifest:full-path="Pictures/1000000000000053000000019B5FE5C9.png" manifest:media-type="image/png"/>
  <manifest:file-entry manifest:full-path="Pictures/1000000000000054000000018C83A892.png" manifest:media-type="image/png"/>
  <manifest:file-entry manifest:full-path="Pictures/100000000000004E00000001D535AEF4.png" manifest:media-type="image/png"/>
  <manifest:file-entry manifest:full-path="Pictures/100000000000005400000001E74D2523.png" manifest:media-type="image/png"/>
  <manifest:file-entry manifest:full-path="Pictures/100000000000005300000001424DB03B.png" manifest:media-type="image/png"/>
  <manifest:file-entry manifest:full-path="Pictures/1000000000000048000000015AE0BD64.png" manifest:media-type="image/png"/>
  <manifest:file-entry manifest:full-path="Pictures/10000000000000550000000105E59F69.png" manifest:media-type="image/png"/>
  <manifest:file-entry manifest:full-path="Pictures/1000000000000055000000019597679A.png" manifest:media-type="image/png"/>
  <manifest:file-entry manifest:full-path="Pictures/100000000000005500000001EE56284F.png" manifest:media-type="image/png"/>
  <manifest:file-entry manifest:full-path="Pictures/1000000000000044000000012E156A13.png" manifest:media-type="image/png"/>
  <manifest:file-entry manifest:full-path="Pictures/100000000000004700000001DDF72AB5.png" manifest:media-type="image/png"/>
  <manifest:file-entry manifest:full-path="Pictures/1000000000000055000000015A9CC3A1.png" manifest:media-type="image/png"/>
  <manifest:file-entry manifest:full-path="Pictures/100000000000004F0000000146C9CE1A.png" manifest:media-type="image/png"/>
  <manifest:file-entry manifest:full-path="Pictures/1000000000000051000000017392757B.png" manifest:media-type="image/png"/>
  <manifest:file-entry manifest:full-path="Pictures/100000000000005200000001F8C27626.png" manifest:media-type="image/png"/>
  <manifest:file-entry manifest:full-path="Pictures/100000000000005400000001436136F8.png" manifest:media-type="image/png"/>
  <manifest:file-entry manifest:full-path="Pictures/100000000000005400000001A66359F1.png" manifest:media-type="image/png"/>
  <manifest:file-entry manifest:full-path="Pictures/1000000000000052000000017C3A4FBC.png" manifest:media-type="image/png"/>
  <manifest:file-entry manifest:full-path="Pictures/100000000000005500000001CE8B8F90.png" manifest:media-type="image/png"/>
  <manifest:file-entry manifest:full-path="Pictures/10000000000000550000000101835DF7.png" manifest:media-type="image/png"/>
  <manifest:file-entry manifest:full-path="Pictures/100000000000005500000001E8ECBA7D.png" manifest:media-type="image/png"/>
  <manifest:file-entry manifest:full-path="Pictures/1000000000000055000000013F042648.png" manifest:media-type="image/png"/>
  <manifest:file-entry manifest:full-path="Pictures/1000000000000055000000012141C600.png" manifest:media-type="image/png"/>
  <manifest:file-entry manifest:full-path="Pictures/1000000000000053000000017B1E14E3.png" manifest:media-type="image/png"/>
  <manifest:file-entry manifest:full-path="Pictures/10000000000000500000000181C68469.png" manifest:media-type="image/png"/>
  <manifest:file-entry manifest:full-path="Pictures/100000000000005200000001FA0E2910.png" manifest:media-type="image/png"/>
  <manifest:file-entry manifest:full-path="Pictures/100000000000004600000001113EF3B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, Bold"/>
    <style:font-face style:name="Calibri1" svg:font-family="Calibri, BoldItalic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" svg:font-family="Times"/>
    <style:font-face style:name="Unknown" svg:font-family="Unknow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solid" draw:fill-color="#000000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7.279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0d0d0d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389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ffffff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862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a5a5a5" loext:decorative="fals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423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748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084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035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solid" draw:fill-color="#990000" loext:decorative="fals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6.123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439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23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8.164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0.823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0.294cm" loext:decorative="false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0.351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7.101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5" style:family="paragraph">
      <loext:graphic-properties draw:fill="solid" draw:fill-color="#0d0d0d"/>
    </style:style>
    <style:style style:name="P6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9" style:family="paragraph">
      <loext:graphic-properties draw:fill="solid" draw:fill-color="#a5a5a5"/>
    </style:style>
    <style:style style:name="P10" style:family="paragraph">
      <loext:graphic-properties draw:fill="none"/>
      <style:text-properties fo:font-size="12pt" style:font-size-asian="12pt" style:font-size-complex="12pt"/>
    </style:style>
    <style:style style:name="P11" style:family="paragraph">
      <loext:graphic-properties draw:fill="solid" draw:fill-color="#990000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text-properties fo:font-size="10.5pt" style:font-size-asian="10.5pt" style:font-size-complex="10.5pt"/>
    </style:style>
    <style:style style:name="T1" style:family="text">
      <style:text-properties fo:color="#000000" loext:opacity="100%" style:font-name="Calibri" fo:font-size="14.1000003814697pt" fo:font-weight="normal" style:font-name-asian="Calibri" style:font-size-asian="14.1000003814697pt" style:font-weight-asian="normal" style:font-name-complex="Calibri" style:font-size-complex="14.1000003814697pt" style:font-weight-complex="normal"/>
    </style:style>
    <style:style style:name="T2" style:family="text">
      <style:text-properties fo:color="#000000" loext:opacity="100%" style:font-name="Unknown" fo:font-size="11.1000003814697pt" fo:font-weight="normal" style:font-name-asian="Unknown" style:font-size-asian="11.1000003814697pt" style:font-weight-asian="normal" style:font-name-complex="Unknown" style:font-size-complex="11.1000003814697pt" style:font-weight-complex="normal"/>
    </style:style>
    <style:style style:name="T3" style:family="text">
      <style:text-properties fo:color="#ffffff" loext:opacity="100%" style:font-name="Unknown" fo:font-size="9.89999961853027pt" fo:font-weight="normal" style:font-name-asian="Unknown" style:font-size-asian="9.89999961853027pt" style:font-weight-asian="normal" style:font-name-complex="Unknown" style:font-size-complex="9.89999961853027pt" style:font-weight-complex="normal"/>
    </style:style>
    <style:style style:name="T4" style:family="text">
      <style:text-properties fo:color="#000000" loext:opacity="100%" style:font-name="Unknown" fo:font-size="12pt" fo:font-weight="normal" style:font-name-asian="Unknown" style:font-size-asian="12pt" style:font-weight-asian="normal" style:font-name-complex="Unknown" style:font-size-complex="12pt" style:font-weight-complex="normal"/>
    </style:style>
    <style:style style:name="T5" style:family="text">
      <style:text-properties fo:color="#000000" loext:opacity="100%" style:font-name="Unknown" fo:font-size="9.89999961853027pt" fo:font-weight="normal" style:font-name-asian="Unknown" style:font-size-asian="9.89999961853027pt" style:font-weight-asian="normal" style:font-name-complex="Unknown" style:font-size-complex="9.89999961853027pt" style:font-weight-complex="normal"/>
    </style:style>
    <style:style style:name="T6" style:family="text">
      <style:text-properties fo:color="#000000" loext:opacity="100%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7" style:family="text">
      <style:text-properties fo:color="#990000" loext:opacity="100%" style:font-name="Unknown" fo:font-size="14.1000003814697pt" fo:font-weight="normal" style:font-name-asian="Unknown" style:font-size-asian="14.1000003814697pt" style:font-weight-asian="normal" style:font-name-complex="Unknown" style:font-size-complex="14.1000003814697pt" style:font-weight-complex="normal"/>
    </style:style>
    <style:style style:name="T8" style:family="text">
      <style:text-properties fo:color="#000000" loext:opacity="100%" style:font-name="Times" fo:font-size="12pt" fo:font-weight="normal" style:font-name-asian="Times" style:font-size-asian="12pt" style:font-weight-asian="normal" style:font-name-complex="Times" style:font-size-complex="12pt" style:font-weight-complex="normal"/>
    </style:style>
    <style:style style:name="T9" style:family="text">
      <style:text-properties fo:color="#000000" loext:opacity="100%" style:font-name="Calibri1" fo:font-size="12pt" fo:font-weight="normal" style:font-name-asian="Calibri1" style:font-size-asian="12pt" style:font-weight-asian="normal" style:font-name-complex="Calibri1" style:font-size-complex="12pt" style:font-weight-complex="normal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color="#000000" loext:opacity="100%" style:font-name="Unknown" fo:font-size="10.5pt" fo:font-weight="normal" style:font-name-asian="Unknown" style:font-size-asian="10.5pt" style:font-weight-asian="normal" style:font-name-complex="Unknown" style:font-size-complex="10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0.634cm" svg:height="0.012cm" svg:x="25.108cm" svg:y="1.283cm">
          <draw:image xlink:href="Pictures/1000000000000032000000012A8244D0.png" xlink:type="simple" xlink:show="embed" xlink:actuate="onLoad" draw:mime-type="image/png">
            <text:p/>
          </draw:image>
        </draw:frame>
        <draw:frame draw:style-name="gr1" draw:text-style-name="P1" draw:layer="layout" svg:width="0.71cm" svg:height="0.012cm" svg:x="25.07cm" svg:y="1.295cm">
          <draw:image xlink:href="Pictures/1000000000000038000000010EE93C94.png" xlink:type="simple" xlink:show="embed" xlink:actuate="onLoad" draw:mime-type="image/png">
            <text:p/>
          </draw:image>
        </draw:frame>
        <draw:frame draw:style-name="gr1" draw:text-style-name="P1" draw:layer="layout" svg:width="0.774cm" svg:height="0.012cm" svg:x="25.044cm" svg:y="1.308cm">
          <draw:image xlink:href="Pictures/100000000000003D000000014334297F.png" xlink:type="simple" xlink:show="embed" xlink:actuate="onLoad" draw:mime-type="image/png">
            <text:p/>
          </draw:image>
        </draw:frame>
        <draw:frame draw:style-name="gr1" draw:text-style-name="P1" draw:layer="layout" svg:width="0.812cm" svg:height="0.012cm" svg:x="25.019cm" svg:y="1.321cm">
          <draw:image xlink:href="Pictures/1000000000000040000000018BFF08F2.png" xlink:type="simple" xlink:show="embed" xlink:actuate="onLoad" draw:mime-type="image/png">
            <text:p/>
          </draw:image>
        </draw:frame>
        <draw:frame draw:style-name="gr1" draw:text-style-name="P1" draw:layer="layout" svg:width="0.85cm" svg:height="0.012cm" svg:x="25.006cm" svg:y="1.334cm">
          <draw:image xlink:href="Pictures/100000000000004300000001047321CC.png" xlink:type="simple" xlink:show="embed" xlink:actuate="onLoad" draw:mime-type="image/png">
            <text:p/>
          </draw:image>
        </draw:frame>
        <draw:frame draw:style-name="gr1" draw:text-style-name="P1" draw:layer="layout" svg:width="0.888cm" svg:height="0.012cm" svg:x="24.981cm" svg:y="1.346cm">
          <draw:image xlink:href="Pictures/1000000000000046000000017EDEF60B.png" xlink:type="simple" xlink:show="embed" xlink:actuate="onLoad" draw:mime-type="image/png">
            <text:p/>
          </draw:image>
        </draw:frame>
        <draw:frame draw:style-name="gr1" draw:text-style-name="P1" draw:layer="layout" svg:width="0.913cm" svg:height="0.012cm" svg:x="24.968cm" svg:y="1.359cm">
          <draw:image xlink:href="Pictures/10000000000000480000000184957F6D.png" xlink:type="simple" xlink:show="embed" xlink:actuate="onLoad" draw:mime-type="image/png">
            <text:p/>
          </draw:image>
        </draw:frame>
        <draw:frame draw:style-name="gr1" draw:text-style-name="P1" draw:layer="layout" svg:width="0.964cm" svg:height="0.012cm" svg:x="24.943cm" svg:y="1.372cm">
          <draw:image xlink:href="Pictures/100000000000004C000000016193D368.png" xlink:type="simple" xlink:show="embed" xlink:actuate="onLoad" draw:mime-type="image/png">
            <text:p/>
          </draw:image>
        </draw:frame>
        <draw:frame draw:style-name="gr1" draw:text-style-name="P1" draw:layer="layout" svg:width="0.977cm" svg:height="0.012cm" svg:x="24.943cm" svg:y="1.384cm">
          <draw:image xlink:href="Pictures/100000000000004D00000001BF9B57FA.png" xlink:type="simple" xlink:show="embed" xlink:actuate="onLoad" draw:mime-type="image/png">
            <text:p/>
          </draw:image>
        </draw:frame>
        <draw:frame draw:style-name="gr1" draw:text-style-name="P1" draw:layer="layout" svg:width="0.99cm" svg:height="0.012cm" svg:x="24.93cm" svg:y="1.397cm">
          <draw:image xlink:href="Pictures/100000000000004E00000001D535AEF4.png" xlink:type="simple" xlink:show="embed" xlink:actuate="onLoad" draw:mime-type="image/png">
            <text:p/>
          </draw:image>
        </draw:frame>
        <draw:frame draw:style-name="gr1" draw:text-style-name="P1" draw:layer="layout" svg:width="1.015cm" svg:height="0.012cm" svg:x="24.917cm" svg:y="1.41cm">
          <draw:image xlink:href="Pictures/1000000000000050000000011ADC2445.png" xlink:type="simple" xlink:show="embed" xlink:actuate="onLoad" draw:mime-type="image/png">
            <text:p/>
          </draw:image>
        </draw:frame>
        <draw:frame draw:style-name="gr1" draw:text-style-name="P1" draw:layer="layout" svg:width="1.028cm" svg:height="0.012cm" svg:x="24.917cm" svg:y="1.422cm">
          <draw:image xlink:href="Pictures/100000000000005100000001F318FF3E.png" xlink:type="simple" xlink:show="embed" xlink:actuate="onLoad" draw:mime-type="image/png">
            <text:p/>
          </draw:image>
        </draw:frame>
        <draw:frame draw:style-name="gr1" draw:text-style-name="P1" draw:layer="layout" svg:width="1.04cm" svg:height="0.012cm" svg:x="24.905cm" svg:y="1.435cm">
          <draw:image xlink:href="Pictures/100000000000005200000001628B97B1.png" xlink:type="simple" xlink:show="embed" xlink:actuate="onLoad" draw:mime-type="image/png">
            <text:p/>
          </draw:image>
        </draw:frame>
        <draw:frame draw:style-name="gr1" draw:text-style-name="P1" draw:layer="layout" svg:width="1.04cm" svg:height="0.012cm" svg:x="24.905cm" svg:y="1.448cm">
          <draw:image xlink:href="Pictures/1000000000000052000000014F36A778.png" xlink:type="simple" xlink:show="embed" xlink:actuate="onLoad" draw:mime-type="image/png">
            <text:p/>
          </draw:image>
        </draw:frame>
        <draw:frame draw:style-name="gr1" draw:text-style-name="P1" draw:layer="layout" svg:width="1.053cm" svg:height="0.012cm" svg:x="24.905cm" svg:y="1.461cm">
          <draw:image xlink:href="Pictures/100000000000005300000001C171D97C.png" xlink:type="simple" xlink:show="embed" xlink:actuate="onLoad" draw:mime-type="image/png">
            <text:p/>
          </draw:image>
        </draw:frame>
        <draw:frame draw:style-name="gr1" draw:text-style-name="P1" draw:layer="layout" svg:width="1.066cm" svg:height="0.012cm" svg:x="24.892cm" svg:y="1.473cm">
          <draw:image xlink:href="Pictures/10000000000000540000000116BE5C62.png" xlink:type="simple" xlink:show="embed" xlink:actuate="onLoad" draw:mime-type="image/png">
            <text:p/>
          </draw:image>
        </draw:frame>
        <draw:frame draw:style-name="gr1" draw:text-style-name="P1" draw:layer="layout" svg:width="1.066cm" svg:height="0.012cm" svg:x="24.892cm" svg:y="1.486cm">
          <draw:image xlink:href="Pictures/100000000000005400000001DF940C69.png" xlink:type="simple" xlink:show="embed" xlink:actuate="onLoad" draw:mime-type="image/png">
            <text:p/>
          </draw:image>
        </draw:frame>
        <draw:frame draw:style-name="gr1" draw:text-style-name="P1" draw:layer="layout" svg:width="1.079cm" svg:height="0.012cm" svg:x="24.892cm" svg:y="1.499cm">
          <draw:image xlink:href="Pictures/1000000000000055000000015FB1E9F8.png" xlink:type="simple" xlink:show="embed" xlink:actuate="onLoad" draw:mime-type="image/png">
            <text:p/>
          </draw:image>
        </draw:frame>
        <draw:frame draw:style-name="gr1" draw:text-style-name="P1" draw:layer="layout" svg:width="1.079cm" svg:height="0.012cm" svg:x="24.892cm" svg:y="1.511cm">
          <draw:image xlink:href="Pictures/1000000000000055000000018ABA7881.png" xlink:type="simple" xlink:show="embed" xlink:actuate="onLoad" draw:mime-type="image/png">
            <text:p/>
          </draw:image>
        </draw:frame>
        <draw:frame draw:style-name="gr1" draw:text-style-name="P1" draw:layer="layout" svg:width="1.079cm" svg:height="0.012cm" svg:x="24.892cm" svg:y="1.524cm">
          <draw:image xlink:href="Pictures/1000000000000055000000014966A683.png" xlink:type="simple" xlink:show="embed" xlink:actuate="onLoad" draw:mime-type="image/png">
            <text:p/>
          </draw:image>
        </draw:frame>
        <draw:frame draw:style-name="gr1" draw:text-style-name="P1" draw:layer="layout" svg:width="1.079cm" svg:height="0.012cm" svg:x="24.892cm" svg:y="1.537cm">
          <draw:image xlink:href="Pictures/1000000000000055000000019B554C41.png" xlink:type="simple" xlink:show="embed" xlink:actuate="onLoad" draw:mime-type="image/png">
            <text:p/>
          </draw:image>
        </draw:frame>
        <draw:frame draw:style-name="gr1" draw:text-style-name="P1" draw:layer="layout" svg:width="1.079cm" svg:height="0.012cm" svg:x="24.892cm" svg:y="1.549cm">
          <draw:image xlink:href="Pictures/100000000000005500000001ECC09333.png" xlink:type="simple" xlink:show="embed" xlink:actuate="onLoad" draw:mime-type="image/png">
            <text:p/>
          </draw:image>
        </draw:frame>
        <draw:frame draw:style-name="gr1" draw:text-style-name="P1" draw:layer="layout" svg:width="0.901cm" svg:height="0.012cm" svg:x="25.07cm" svg:y="1.562cm">
          <draw:image xlink:href="Pictures/1000000000000047000000017E6133AE.png" xlink:type="simple" xlink:show="embed" xlink:actuate="onLoad" draw:mime-type="image/png">
            <text:p/>
          </draw:image>
        </draw:frame>
        <draw:frame draw:style-name="gr1" draw:text-style-name="P1" draw:layer="layout" svg:width="0.913cm" svg:height="0.012cm" svg:x="25.057cm" svg:y="1.575cm">
          <draw:image xlink:href="Pictures/1000000000000048000000015AE0BD64.png" xlink:type="simple" xlink:show="embed" xlink:actuate="onLoad" draw:mime-type="image/png">
            <text:p/>
          </draw:image>
        </draw:frame>
        <draw:frame draw:style-name="gr1" draw:text-style-name="P1" draw:layer="layout" svg:width="0.939cm" svg:height="0.012cm" svg:x="25.032cm" svg:y="1.588cm">
          <draw:image xlink:href="Pictures/100000000000004A00000001D5978C6A.png" xlink:type="simple" xlink:show="embed" xlink:actuate="onLoad" draw:mime-type="image/png">
            <text:p/>
          </draw:image>
        </draw:frame>
        <draw:frame draw:style-name="gr1" draw:text-style-name="P1" draw:layer="layout" svg:width="0.964cm" svg:height="0.012cm" svg:x="25.006cm" svg:y="1.6cm">
          <draw:image xlink:href="Pictures/100000000000004C00000001741BB5AC.png" xlink:type="simple" xlink:show="embed" xlink:actuate="onLoad" draw:mime-type="image/png">
            <text:p/>
          </draw:image>
        </draw:frame>
        <draw:frame draw:style-name="gr1" draw:text-style-name="P1" draw:layer="layout" svg:width="0.964cm" svg:height="0.012cm" svg:x="24.994cm" svg:y="1.613cm">
          <draw:image xlink:href="Pictures/100000000000004C0000000181E70B0E.png" xlink:type="simple" xlink:show="embed" xlink:actuate="onLoad" draw:mime-type="image/png">
            <text:p/>
          </draw:image>
        </draw:frame>
        <draw:frame draw:style-name="gr1" draw:text-style-name="P1" draw:layer="layout" svg:width="0.977cm" svg:height="0.012cm" svg:x="24.981cm" svg:y="1.626cm">
          <draw:image xlink:href="Pictures/100000000000004D0000000134C4441E.png" xlink:type="simple" xlink:show="embed" xlink:actuate="onLoad" draw:mime-type="image/png">
            <text:p/>
          </draw:image>
        </draw:frame>
        <draw:frame draw:style-name="gr1" draw:text-style-name="P1" draw:layer="layout" svg:width="0.99cm" svg:height="0.012cm" svg:x="24.968cm" svg:y="1.638cm">
          <draw:image xlink:href="Pictures/100000000000004E0000000165FF1DF3.png" xlink:type="simple" xlink:show="embed" xlink:actuate="onLoad" draw:mime-type="image/png">
            <text:p/>
          </draw:image>
        </draw:frame>
        <draw:frame draw:style-name="gr1" draw:text-style-name="P1" draw:layer="layout" svg:width="1.002cm" svg:height="0.012cm" svg:x="24.943cm" svg:y="1.651cm">
          <draw:image xlink:href="Pictures/100000000000004F0000000199687642.png" xlink:type="simple" xlink:show="embed" xlink:actuate="onLoad" draw:mime-type="image/png">
            <text:p/>
          </draw:image>
        </draw:frame>
        <draw:frame draw:style-name="gr1" draw:text-style-name="P1" draw:layer="layout" svg:width="1.015cm" svg:height="0.012cm" svg:x="24.93cm" svg:y="1.664cm">
          <draw:image xlink:href="Pictures/100000000000005000000001121B5203.png" xlink:type="simple" xlink:show="embed" xlink:actuate="onLoad" draw:mime-type="image/png">
            <text:p/>
          </draw:image>
        </draw:frame>
        <draw:frame draw:style-name="gr1" draw:text-style-name="P1" draw:layer="layout" svg:width="1.002cm" svg:height="0.012cm" svg:x="24.93cm" svg:y="1.676cm">
          <draw:image xlink:href="Pictures/100000000000004F00000001F466C5E5.png" xlink:type="simple" xlink:show="embed" xlink:actuate="onLoad" draw:mime-type="image/png">
            <text:p/>
          </draw:image>
        </draw:frame>
        <draw:frame draw:style-name="gr1" draw:text-style-name="P1" draw:layer="layout" svg:width="1.015cm" svg:height="0.012cm" svg:x="24.917cm" svg:y="1.689cm">
          <draw:image xlink:href="Pictures/10000000000000500000000163F35504.png" xlink:type="simple" xlink:show="embed" xlink:actuate="onLoad" draw:mime-type="image/png">
            <text:p/>
          </draw:image>
        </draw:frame>
        <draw:frame draw:style-name="gr1" draw:text-style-name="P1" draw:layer="layout" svg:width="1.002cm" svg:height="0.012cm" svg:x="24.917cm" svg:y="1.702cm">
          <draw:image xlink:href="Pictures/100000000000004F00000001A24F274B.png" xlink:type="simple" xlink:show="embed" xlink:actuate="onLoad" draw:mime-type="image/png">
            <text:p/>
          </draw:image>
        </draw:frame>
        <draw:frame draw:style-name="gr1" draw:text-style-name="P1" draw:layer="layout" svg:width="1.002cm" svg:height="0.012cm" svg:x="24.905cm" svg:y="1.715cm">
          <draw:image xlink:href="Pictures/100000000000004F00000001E8534CD3.png" xlink:type="simple" xlink:show="embed" xlink:actuate="onLoad" draw:mime-type="image/png">
            <text:p/>
          </draw:image>
        </draw:frame>
        <draw:frame draw:style-name="gr1" draw:text-style-name="P1" draw:layer="layout" svg:width="0.99cm" svg:height="0.012cm" svg:x="24.905cm" svg:y="1.727cm">
          <draw:image xlink:href="Pictures/100000000000004E00000001277F5F0C.png" xlink:type="simple" xlink:show="embed" xlink:actuate="onLoad" draw:mime-type="image/png">
            <text:p/>
          </draw:image>
        </draw:frame>
        <draw:frame draw:style-name="gr1" draw:text-style-name="P1" draw:layer="layout" svg:width="0.99cm" svg:height="0.012cm" svg:x="24.892cm" svg:y="1.74cm">
          <draw:image xlink:href="Pictures/100000000000004E000000011017A80B.png" xlink:type="simple" xlink:show="embed" xlink:actuate="onLoad" draw:mime-type="image/png">
            <text:p/>
          </draw:image>
        </draw:frame>
        <draw:frame draw:style-name="gr1" draw:text-style-name="P1" draw:layer="layout" svg:width="0.977cm" svg:height="0.012cm" svg:x="24.892cm" svg:y="1.753cm">
          <draw:image xlink:href="Pictures/100000000000004D00000001D25C5A6F.png" xlink:type="simple" xlink:show="embed" xlink:actuate="onLoad" draw:mime-type="image/png">
            <text:p/>
          </draw:image>
        </draw:frame>
        <draw:frame draw:style-name="gr1" draw:text-style-name="P1" draw:layer="layout" svg:width="0.964cm" svg:height="0.012cm" svg:x="24.892cm" svg:y="1.765cm">
          <draw:image xlink:href="Pictures/100000000000004C00000001E37F7596.png" xlink:type="simple" xlink:show="embed" xlink:actuate="onLoad" draw:mime-type="image/png">
            <text:p/>
          </draw:image>
        </draw:frame>
        <draw:frame draw:style-name="gr1" draw:text-style-name="P1" draw:layer="layout" svg:width="0.952cm" svg:height="0.012cm" svg:x="24.892cm" svg:y="1.778cm">
          <draw:image xlink:href="Pictures/100000000000004B000000012DB4288A.png" xlink:type="simple" xlink:show="embed" xlink:actuate="onLoad" draw:mime-type="image/png">
            <text:p/>
          </draw:image>
        </draw:frame>
        <draw:frame draw:style-name="gr1" draw:text-style-name="P1" draw:layer="layout" svg:width="0.926cm" svg:height="0.012cm" svg:x="24.892cm" svg:y="1.791cm">
          <draw:image xlink:href="Pictures/1000000000000049000000014513A830.png" xlink:type="simple" xlink:show="embed" xlink:actuate="onLoad" draw:mime-type="image/png">
            <text:p/>
          </draw:image>
        </draw:frame>
        <draw:frame draw:style-name="gr1" draw:text-style-name="P1" draw:layer="layout" svg:width="0.901cm" svg:height="0.012cm" svg:x="24.892cm" svg:y="1.803cm">
          <draw:image xlink:href="Pictures/1000000000000047000000018B13E1B4.png" xlink:type="simple" xlink:show="embed" xlink:actuate="onLoad" draw:mime-type="image/png">
            <text:p/>
          </draw:image>
        </draw:frame>
        <draw:frame draw:style-name="gr1" draw:text-style-name="P1" draw:layer="layout" svg:width="0.863cm" svg:height="0.012cm" svg:x="24.892cm" svg:y="1.816cm">
          <draw:image xlink:href="Pictures/10000000000000440000000178447203.png" xlink:type="simple" xlink:show="embed" xlink:actuate="onLoad" draw:mime-type="image/png">
            <text:p/>
          </draw:image>
        </draw:frame>
        <draw:frame draw:style-name="gr1" draw:text-style-name="P1" draw:layer="layout" svg:width="1.079cm" svg:height="0.012cm" svg:x="24.892cm" svg:y="1.829cm">
          <draw:image xlink:href="Pictures/100000000000005500000001EB6D73A7.png" xlink:type="simple" xlink:show="embed" xlink:actuate="onLoad" draw:mime-type="image/png">
            <text:p/>
          </draw:image>
        </draw:frame>
        <draw:frame draw:style-name="gr1" draw:text-style-name="P1" draw:layer="layout" svg:width="1.079cm" svg:height="0.012cm" svg:x="24.892cm" svg:y="1.842cm">
          <draw:image xlink:href="Pictures/10000000000000550000000104CD73A5.png" xlink:type="simple" xlink:show="embed" xlink:actuate="onLoad" draw:mime-type="image/png">
            <text:p/>
          </draw:image>
        </draw:frame>
        <draw:frame draw:style-name="gr1" draw:text-style-name="P1" draw:layer="layout" svg:width="1.079cm" svg:height="0.012cm" svg:x="24.892cm" svg:y="1.854cm">
          <draw:image xlink:href="Pictures/100000000000005500000001963F57DA.png" xlink:type="simple" xlink:show="embed" xlink:actuate="onLoad" draw:mime-type="image/png">
            <text:p/>
          </draw:image>
        </draw:frame>
        <draw:frame draw:style-name="gr1" draw:text-style-name="P1" draw:layer="layout" svg:width="1.079cm" svg:height="0.012cm" svg:x="24.892cm" svg:y="1.867cm">
          <draw:image xlink:href="Pictures/100000000000005500000001315C948B.png" xlink:type="simple" xlink:show="embed" xlink:actuate="onLoad" draw:mime-type="image/png">
            <text:p/>
          </draw:image>
        </draw:frame>
        <draw:frame draw:style-name="gr1" draw:text-style-name="P1" draw:layer="layout" svg:width="1.079cm" svg:height="0.012cm" svg:x="24.892cm" svg:y="1.88cm">
          <draw:image xlink:href="Pictures/1000000000000055000000012787F1EB.png" xlink:type="simple" xlink:show="embed" xlink:actuate="onLoad" draw:mime-type="image/png">
            <text:p/>
          </draw:image>
        </draw:frame>
        <draw:frame draw:style-name="gr1" draw:text-style-name="P1" draw:layer="layout" svg:width="1.079cm" svg:height="0.012cm" svg:x="24.892cm" svg:y="1.892cm">
          <draw:image xlink:href="Pictures/10000000000000550000000144CC0279.png" xlink:type="simple" xlink:show="embed" xlink:actuate="onLoad" draw:mime-type="image/png">
            <text:p/>
          </draw:image>
        </draw:frame>
        <draw:frame draw:style-name="gr1" draw:text-style-name="P1" draw:layer="layout" svg:width="1.079cm" svg:height="0.012cm" svg:x="24.892cm" svg:y="1.905cm">
          <draw:image xlink:href="Pictures/10000000000000550000000178E0AA6E.png" xlink:type="simple" xlink:show="embed" xlink:actuate="onLoad" draw:mime-type="image/png">
            <text:p/>
          </draw:image>
        </draw:frame>
        <draw:frame draw:style-name="gr1" draw:text-style-name="P1" draw:layer="layout" svg:width="1.079cm" svg:height="0.012cm" svg:x="24.892cm" svg:y="1.918cm">
          <draw:image xlink:href="Pictures/1000000000000055000000019C502B48.png" xlink:type="simple" xlink:show="embed" xlink:actuate="onLoad" draw:mime-type="image/png">
            <text:p/>
          </draw:image>
        </draw:frame>
        <draw:frame draw:style-name="gr1" draw:text-style-name="P1" draw:layer="layout" svg:width="1.079cm" svg:height="0.012cm" svg:x="24.892cm" svg:y="1.93cm">
          <draw:image xlink:href="Pictures/1000000000000055000000018771FF1D.png" xlink:type="simple" xlink:show="embed" xlink:actuate="onLoad" draw:mime-type="image/png">
            <text:p/>
          </draw:image>
        </draw:frame>
        <draw:frame draw:style-name="gr1" draw:text-style-name="P1" draw:layer="layout" svg:width="1.079cm" svg:height="0.012cm" svg:x="24.892cm" svg:y="1.943cm">
          <draw:image xlink:href="Pictures/1000000000000055000000019DB1A4E0.png" xlink:type="simple" xlink:show="embed" xlink:actuate="onLoad" draw:mime-type="image/png">
            <text:p/>
          </draw:image>
        </draw:frame>
        <draw:frame draw:style-name="gr1" draw:text-style-name="P1" draw:layer="layout" svg:width="1.079cm" svg:height="0.012cm" svg:x="24.892cm" svg:y="1.956cm">
          <draw:image xlink:href="Pictures/1000000000000055000000011336B745.png" xlink:type="simple" xlink:show="embed" xlink:actuate="onLoad" draw:mime-type="image/png">
            <text:p/>
          </draw:image>
        </draw:frame>
        <draw:frame draw:style-name="gr1" draw:text-style-name="P1" draw:layer="layout" svg:width="1.079cm" svg:height="0.012cm" svg:x="24.892cm" svg:y="1.969cm">
          <draw:image xlink:href="Pictures/10000000000000550000000130CC98BD.png" xlink:type="simple" xlink:show="embed" xlink:actuate="onLoad" draw:mime-type="image/png">
            <text:p/>
          </draw:image>
        </draw:frame>
        <draw:frame draw:style-name="gr1" draw:text-style-name="P1" draw:layer="layout" svg:width="1.079cm" svg:height="0.012cm" svg:x="24.892cm" svg:y="1.981cm">
          <draw:image xlink:href="Pictures/1000000000000055000000016BFCEBB8.png" xlink:type="simple" xlink:show="embed" xlink:actuate="onLoad" draw:mime-type="image/png">
            <text:p/>
          </draw:image>
        </draw:frame>
        <draw:frame draw:style-name="gr1" draw:text-style-name="P1" draw:layer="layout" svg:width="1.079cm" svg:height="0.012cm" svg:x="24.892cm" svg:y="1.994cm">
          <draw:image xlink:href="Pictures/100000000000005500000001DF9AC24C.png" xlink:type="simple" xlink:show="embed" xlink:actuate="onLoad" draw:mime-type="image/png">
            <text:p/>
          </draw:image>
        </draw:frame>
        <draw:frame draw:style-name="gr1" draw:text-style-name="P1" draw:layer="layout" svg:width="1.079cm" svg:height="0.012cm" svg:x="24.892cm" svg:y="2.007cm">
          <draw:image xlink:href="Pictures/100000000000005500000001AF26F9D5.png" xlink:type="simple" xlink:show="embed" xlink:actuate="onLoad" draw:mime-type="image/png">
            <text:p/>
          </draw:image>
        </draw:frame>
        <draw:frame draw:style-name="gr1" draw:text-style-name="P1" draw:layer="layout" svg:width="1.079cm" svg:height="0.012cm" svg:x="24.892cm" svg:y="2.019cm">
          <draw:image xlink:href="Pictures/1000000000000055000000017106662A.png" xlink:type="simple" xlink:show="embed" xlink:actuate="onLoad" draw:mime-type="image/png">
            <text:p/>
          </draw:image>
        </draw:frame>
        <draw:frame draw:style-name="gr1" draw:text-style-name="P1" draw:layer="layout" svg:width="1.079cm" svg:height="0.012cm" svg:x="24.892cm" svg:y="2.032cm">
          <draw:image xlink:href="Pictures/100000000000005500000001B3D62835.png" xlink:type="simple" xlink:show="embed" xlink:actuate="onLoad" draw:mime-type="image/png">
            <text:p/>
          </draw:image>
        </draw:frame>
        <draw:frame draw:style-name="gr1" draw:text-style-name="P1" draw:layer="layout" svg:width="1.079cm" svg:height="0.012cm" svg:x="24.892cm" svg:y="2.045cm">
          <draw:image xlink:href="Pictures/1000000000000055000000013F042648.png" xlink:type="simple" xlink:show="embed" xlink:actuate="onLoad" draw:mime-type="image/png">
            <text:p/>
          </draw:image>
        </draw:frame>
        <draw:frame draw:style-name="gr1" draw:text-style-name="P1" draw:layer="layout" svg:width="1.079cm" svg:height="0.012cm" svg:x="24.892cm" svg:y="2.057cm">
          <draw:image xlink:href="Pictures/10000000000000550000000159AC89E8.png" xlink:type="simple" xlink:show="embed" xlink:actuate="onLoad" draw:mime-type="image/png">
            <text:p/>
          </draw:image>
        </draw:frame>
        <draw:frame draw:style-name="gr1" draw:text-style-name="P1" draw:layer="layout" svg:width="1.079cm" svg:height="0.012cm" svg:x="24.892cm" svg:y="2.07cm">
          <draw:image xlink:href="Pictures/10000000000000550000000174A2AB2C.png" xlink:type="simple" xlink:show="embed" xlink:actuate="onLoad" draw:mime-type="image/png">
            <text:p/>
          </draw:image>
        </draw:frame>
        <draw:frame draw:style-name="gr1" draw:text-style-name="P1" draw:layer="layout" svg:width="1.079cm" svg:height="0.012cm" svg:x="24.892cm" svg:y="2.083cm">
          <draw:image xlink:href="Pictures/10000000000000550000000101835DF7.png" xlink:type="simple" xlink:show="embed" xlink:actuate="onLoad" draw:mime-type="image/png">
            <text:p/>
          </draw:image>
        </draw:frame>
        <draw:frame draw:style-name="gr1" draw:text-style-name="P1" draw:layer="layout" svg:width="1.079cm" svg:height="0.012cm" svg:x="24.892cm" svg:y="2.096cm">
          <draw:image xlink:href="Pictures/10000000000000550000000176A443FC.png" xlink:type="simple" xlink:show="embed" xlink:actuate="onLoad" draw:mime-type="image/png">
            <text:p/>
          </draw:image>
        </draw:frame>
        <draw:frame draw:style-name="gr1" draw:text-style-name="P1" draw:layer="layout" svg:width="0.215cm" svg:height="0.012cm" svg:x="25.324cm" svg:y="2.108cm">
          <draw:image xlink:href="Pictures/10000000000000110000000116313D80.png" xlink:type="simple" xlink:show="embed" xlink:actuate="onLoad" draw:mime-type="image/png">
            <text:p/>
          </draw:image>
        </draw:frame>
        <draw:frame draw:style-name="gr1" draw:text-style-name="P1" draw:layer="layout" svg:width="0.215cm" svg:height="0.012cm" svg:x="25.324cm" svg:y="2.121cm">
          <draw:image xlink:href="Pictures/100000000000001100000001EBBBD482.png" xlink:type="simple" xlink:show="embed" xlink:actuate="onLoad" draw:mime-type="image/png">
            <text:p/>
          </draw:image>
        </draw:frame>
        <draw:frame draw:style-name="gr1" draw:text-style-name="P1" draw:layer="layout" svg:width="0.202cm" svg:height="0.012cm" svg:x="25.324cm" svg:y="2.134cm">
          <draw:image xlink:href="Pictures/1000000000000010000000011AEC788C.png" xlink:type="simple" xlink:show="embed" xlink:actuate="onLoad" draw:mime-type="image/png">
            <text:p/>
          </draw:image>
        </draw:frame>
        <draw:frame draw:style-name="gr1" draw:text-style-name="P1" draw:layer="layout" svg:width="0.596cm" svg:height="0.012cm" svg:x="25.121cm" svg:y="2.146cm">
          <draw:image xlink:href="Pictures/100000000000002F000000018266D0E1.png" xlink:type="simple" xlink:show="embed" xlink:actuate="onLoad" draw:mime-type="image/png">
            <text:p/>
          </draw:image>
        </draw:frame>
        <draw:frame draw:style-name="gr1" draw:text-style-name="P1" draw:layer="layout" svg:width="0.71cm" svg:height="0.012cm" svg:x="25.07cm" svg:y="2.159cm">
          <draw:image xlink:href="Pictures/100000000000003800000001112BC7BE.png" xlink:type="simple" xlink:show="embed" xlink:actuate="onLoad" draw:mime-type="image/png">
            <text:p/>
          </draw:image>
        </draw:frame>
        <draw:frame draw:style-name="gr1" draw:text-style-name="P1" draw:layer="layout" svg:width="0.761cm" svg:height="0.012cm" svg:x="25.044cm" svg:y="2.172cm">
          <draw:image xlink:href="Pictures/100000000000003C000000017331A33D.png" xlink:type="simple" xlink:show="embed" xlink:actuate="onLoad" draw:mime-type="image/png">
            <text:p/>
          </draw:image>
        </draw:frame>
        <draw:frame draw:style-name="gr1" draw:text-style-name="P1" draw:layer="layout" svg:width="0.812cm" svg:height="0.012cm" svg:x="25.019cm" svg:y="2.184cm">
          <draw:image xlink:href="Pictures/1000000000000040000000013A89581D.png" xlink:type="simple" xlink:show="embed" xlink:actuate="onLoad" draw:mime-type="image/png">
            <text:p/>
          </draw:image>
        </draw:frame>
        <draw:frame draw:style-name="gr1" draw:text-style-name="P1" draw:layer="layout" svg:width="0.85cm" svg:height="0.012cm" svg:x="25.006cm" svg:y="2.197cm">
          <draw:image xlink:href="Pictures/100000000000004300000001450F14AB.png" xlink:type="simple" xlink:show="embed" xlink:actuate="onLoad" draw:mime-type="image/png">
            <text:p/>
          </draw:image>
        </draw:frame>
        <draw:frame draw:style-name="gr1" draw:text-style-name="P1" draw:layer="layout" svg:width="0.913cm" svg:height="0.012cm" svg:x="24.968cm" svg:y="2.21cm">
          <draw:image xlink:href="Pictures/100000000000004800000001315514D0.png" xlink:type="simple" xlink:show="embed" xlink:actuate="onLoad" draw:mime-type="image/png">
            <text:p/>
          </draw:image>
        </draw:frame>
        <draw:frame draw:style-name="gr1" draw:text-style-name="P1" draw:layer="layout" svg:width="0.939cm" svg:height="0.012cm" svg:x="24.956cm" svg:y="2.223cm">
          <draw:image xlink:href="Pictures/100000000000004A0000000141ECB810.png" xlink:type="simple" xlink:show="embed" xlink:actuate="onLoad" draw:mime-type="image/png">
            <text:p/>
          </draw:image>
        </draw:frame>
        <draw:frame draw:style-name="gr1" draw:text-style-name="P1" draw:layer="layout" svg:width="0.952cm" svg:height="0.012cm" svg:x="24.956cm" svg:y="2.235cm">
          <draw:image xlink:href="Pictures/100000000000004B00000001BC8D0D55.png" xlink:type="simple" xlink:show="embed" xlink:actuate="onLoad" draw:mime-type="image/png">
            <text:p/>
          </draw:image>
        </draw:frame>
        <draw:frame draw:style-name="gr1" draw:text-style-name="P1" draw:layer="layout" svg:width="0.977cm" svg:height="0.012cm" svg:x="24.943cm" svg:y="2.248cm">
          <draw:image xlink:href="Pictures/100000000000004D0000000182F6B0F5.png" xlink:type="simple" xlink:show="embed" xlink:actuate="onLoad" draw:mime-type="image/png">
            <text:p/>
          </draw:image>
        </draw:frame>
        <draw:frame draw:style-name="gr1" draw:text-style-name="P1" draw:layer="layout" svg:width="0.99cm" svg:height="0.012cm" svg:x="24.93cm" svg:y="2.261cm">
          <draw:image xlink:href="Pictures/100000000000004E0000000117B9C9BD.png" xlink:type="simple" xlink:show="embed" xlink:actuate="onLoad" draw:mime-type="image/png">
            <text:p/>
          </draw:image>
        </draw:frame>
        <draw:frame draw:style-name="gr1" draw:text-style-name="P1" draw:layer="layout" svg:width="1.002cm" svg:height="0.012cm" svg:x="24.93cm" svg:y="2.273cm">
          <draw:image xlink:href="Pictures/100000000000004F00000001CE4F4DD5.png" xlink:type="simple" xlink:show="embed" xlink:actuate="onLoad" draw:mime-type="image/png">
            <text:p/>
          </draw:image>
        </draw:frame>
        <draw:frame draw:style-name="gr1" draw:text-style-name="P1" draw:layer="layout" svg:width="1.015cm" svg:height="0.012cm" svg:x="24.917cm" svg:y="2.286cm">
          <draw:image xlink:href="Pictures/100000000000005000000001473100FB.png" xlink:type="simple" xlink:show="embed" xlink:actuate="onLoad" draw:mime-type="image/png">
            <text:p/>
          </draw:image>
        </draw:frame>
        <draw:frame draw:style-name="gr1" draw:text-style-name="P1" draw:layer="layout" svg:width="1.028cm" svg:height="0.012cm" svg:x="24.917cm" svg:y="2.299cm">
          <draw:image xlink:href="Pictures/10000000000000510000000160F66ED4.png" xlink:type="simple" xlink:show="embed" xlink:actuate="onLoad" draw:mime-type="image/png">
            <text:p/>
          </draw:image>
        </draw:frame>
        <draw:frame draw:style-name="gr1" draw:text-style-name="P1" draw:layer="layout" svg:width="1.04cm" svg:height="0.012cm" svg:x="24.905cm" svg:y="2.311cm">
          <draw:image xlink:href="Pictures/1000000000000052000000015804194F.png" xlink:type="simple" xlink:show="embed" xlink:actuate="onLoad" draw:mime-type="image/png">
            <text:p/>
          </draw:image>
        </draw:frame>
        <draw:frame draw:style-name="gr1" draw:text-style-name="P1" draw:layer="layout" svg:width="1.053cm" svg:height="0.012cm" svg:x="24.905cm" svg:y="2.324cm">
          <draw:image xlink:href="Pictures/1000000000000053000000019B5FE5C9.png" xlink:type="simple" xlink:show="embed" xlink:actuate="onLoad" draw:mime-type="image/png">
            <text:p/>
          </draw:image>
        </draw:frame>
        <draw:frame draw:style-name="gr1" draw:text-style-name="P1" draw:layer="layout" svg:width="1.066cm" svg:height="0.012cm" svg:x="24.892cm" svg:y="2.337cm">
          <draw:image xlink:href="Pictures/1000000000000054000000018C83A892.png" xlink:type="simple" xlink:show="embed" xlink:actuate="onLoad" draw:mime-type="image/png">
            <text:p/>
          </draw:image>
        </draw:frame>
        <draw:frame draw:style-name="gr1" draw:text-style-name="P1" draw:layer="layout" svg:width="1.066cm" svg:height="0.012cm" svg:x="24.892cm" svg:y="2.35cm">
          <draw:image xlink:href="Pictures/100000000000005400000001E74D2523.png" xlink:type="simple" xlink:show="embed" xlink:actuate="onLoad" draw:mime-type="image/png">
            <text:p/>
          </draw:image>
        </draw:frame>
        <draw:frame draw:style-name="gr1" draw:text-style-name="P1" draw:layer="layout" svg:width="1.079cm" svg:height="0.012cm" svg:x="24.892cm" svg:y="2.362cm">
          <draw:image xlink:href="Pictures/10000000000000550000000105E59F69.png" xlink:type="simple" xlink:show="embed" xlink:actuate="onLoad" draw:mime-type="image/png">
            <text:p/>
          </draw:image>
        </draw:frame>
        <draw:frame draw:style-name="gr1" draw:text-style-name="P1" draw:layer="layout" svg:width="1.079cm" svg:height="0.012cm" svg:x="24.892cm" svg:y="2.375cm">
          <draw:image xlink:href="Pictures/100000000000005500000001F21F24A6.png" xlink:type="simple" xlink:show="embed" xlink:actuate="onLoad" draw:mime-type="image/png">
            <text:p/>
          </draw:image>
        </draw:frame>
        <draw:frame draw:style-name="gr1" draw:text-style-name="P1" draw:layer="layout" svg:width="1.079cm" svg:height="0.012cm" svg:x="24.892cm" svg:y="2.388cm">
          <draw:image xlink:href="Pictures/1000000000000055000000019597679A.png" xlink:type="simple" xlink:show="embed" xlink:actuate="onLoad" draw:mime-type="image/png">
            <text:p/>
          </draw:image>
        </draw:frame>
        <draw:frame draw:style-name="gr1" draw:text-style-name="P1" draw:layer="layout" svg:width="1.079cm" svg:height="0.012cm" svg:x="24.892cm" svg:y="2.4cm">
          <draw:image xlink:href="Pictures/10000000000000550000000190F70A9D.png" xlink:type="simple" xlink:show="embed" xlink:actuate="onLoad" draw:mime-type="image/png">
            <text:p/>
          </draw:image>
        </draw:frame>
        <draw:frame draw:style-name="gr1" draw:text-style-name="P1" draw:layer="layout" svg:width="1.079cm" svg:height="0.012cm" svg:x="24.892cm" svg:y="2.413cm">
          <draw:image xlink:href="Pictures/1000000000000055000000015A9CC3A1.png" xlink:type="simple" xlink:show="embed" xlink:actuate="onLoad" draw:mime-type="image/png">
            <text:p/>
          </draw:image>
        </draw:frame>
        <draw:frame draw:style-name="gr1" draw:text-style-name="P1" draw:layer="layout" svg:width="0.863cm" svg:height="0.012cm" svg:x="24.892cm" svg:y="2.426cm">
          <draw:image xlink:href="Pictures/1000000000000044000000012E156A13.png" xlink:type="simple" xlink:show="embed" xlink:actuate="onLoad" draw:mime-type="image/png">
            <text:p/>
          </draw:image>
        </draw:frame>
        <draw:frame draw:style-name="gr1" draw:text-style-name="P1" draw:layer="layout" svg:width="0.901cm" svg:height="0.012cm" svg:x="24.892cm" svg:y="2.438cm">
          <draw:image xlink:href="Pictures/100000000000004700000001DDF72AB5.png" xlink:type="simple" xlink:show="embed" xlink:actuate="onLoad" draw:mime-type="image/png">
            <text:p/>
          </draw:image>
        </draw:frame>
        <draw:frame draw:style-name="gr1" draw:text-style-name="P1" draw:layer="layout" svg:width="0.926cm" svg:height="0.012cm" svg:x="24.892cm" svg:y="2.451cm">
          <draw:image xlink:href="Pictures/1000000000000049000000012229C98A.png" xlink:type="simple" xlink:show="embed" xlink:actuate="onLoad" draw:mime-type="image/png">
            <text:p/>
          </draw:image>
        </draw:frame>
        <draw:frame draw:style-name="gr1" draw:text-style-name="P1" draw:layer="layout" svg:width="0.952cm" svg:height="0.012cm" svg:x="24.892cm" svg:y="2.464cm">
          <draw:image xlink:href="Pictures/100000000000004B00000001ACC2F3B2.png" xlink:type="simple" xlink:show="embed" xlink:actuate="onLoad" draw:mime-type="image/png">
            <text:p/>
          </draw:image>
        </draw:frame>
        <draw:frame draw:style-name="gr1" draw:text-style-name="P1" draw:layer="layout" svg:width="0.964cm" svg:height="0.012cm" svg:x="24.892cm" svg:y="2.477cm">
          <draw:image xlink:href="Pictures/100000000000004C00000001C6AD5D63.png" xlink:type="simple" xlink:show="embed" xlink:actuate="onLoad" draw:mime-type="image/png">
            <text:p/>
          </draw:image>
        </draw:frame>
        <draw:frame draw:style-name="gr1" draw:text-style-name="P1" draw:layer="layout" svg:width="1.002cm" svg:height="0.012cm" svg:x="24.892cm" svg:y="2.489cm">
          <draw:image xlink:href="Pictures/100000000000004F00000001C3A4469A.png" xlink:type="simple" xlink:show="embed" xlink:actuate="onLoad" draw:mime-type="image/png">
            <text:p/>
          </draw:image>
        </draw:frame>
        <draw:frame draw:style-name="gr1" draw:text-style-name="P1" draw:layer="layout" svg:width="1.002cm" svg:height="0.012cm" svg:x="24.892cm" svg:y="2.502cm">
          <draw:image xlink:href="Pictures/100000000000004F0000000146C9CE1A.png" xlink:type="simple" xlink:show="embed" xlink:actuate="onLoad" draw:mime-type="image/png">
            <text:p/>
          </draw:image>
        </draw:frame>
        <draw:frame draw:style-name="gr1" draw:text-style-name="P1" draw:layer="layout" svg:width="1.015cm" svg:height="0.012cm" svg:x="24.892cm" svg:y="2.515cm">
          <draw:image xlink:href="Pictures/10000000000000500000000176C81FF2.png" xlink:type="simple" xlink:show="embed" xlink:actuate="onLoad" draw:mime-type="image/png">
            <text:p/>
          </draw:image>
        </draw:frame>
        <draw:frame draw:style-name="gr1" draw:text-style-name="P1" draw:layer="layout" svg:width="1.028cm" svg:height="0.012cm" svg:x="24.892cm" svg:y="2.527cm">
          <draw:image xlink:href="Pictures/1000000000000051000000017392757B.png" xlink:type="simple" xlink:show="embed" xlink:actuate="onLoad" draw:mime-type="image/png">
            <text:p/>
          </draw:image>
        </draw:frame>
        <draw:frame draw:style-name="gr1" draw:text-style-name="P1" draw:layer="layout" svg:width="1.04cm" svg:height="0.012cm" svg:x="24.892cm" svg:y="2.54cm">
          <draw:image xlink:href="Pictures/1000000000000052000000015D9F0879.png" xlink:type="simple" xlink:show="embed" xlink:actuate="onLoad" draw:mime-type="image/png">
            <text:p/>
          </draw:image>
        </draw:frame>
        <draw:frame draw:style-name="gr1" draw:text-style-name="P1" draw:layer="layout" svg:width="1.04cm" svg:height="0.012cm" svg:x="24.892cm" svg:y="2.553cm">
          <draw:image xlink:href="Pictures/100000000000005200000001F8C27626.png" xlink:type="simple" xlink:show="embed" xlink:actuate="onLoad" draw:mime-type="image/png">
            <text:p/>
          </draw:image>
        </draw:frame>
        <draw:frame draw:style-name="gr1" draw:text-style-name="P1" draw:layer="layout" svg:width="1.053cm" svg:height="0.012cm" svg:x="24.892cm" svg:y="2.565cm">
          <draw:image xlink:href="Pictures/100000000000005300000001B3C10AE4.png" xlink:type="simple" xlink:show="embed" xlink:actuate="onLoad" draw:mime-type="image/png">
            <text:p/>
          </draw:image>
        </draw:frame>
        <draw:frame draw:style-name="gr1" draw:text-style-name="P1" draw:layer="layout" svg:width="1.053cm" svg:height="0.012cm" svg:x="24.892cm" svg:y="2.578cm">
          <draw:image xlink:href="Pictures/100000000000005300000001424DB03B.png" xlink:type="simple" xlink:show="embed" xlink:actuate="onLoad" draw:mime-type="image/png">
            <text:p/>
          </draw:image>
        </draw:frame>
        <draw:frame draw:style-name="gr1" draw:text-style-name="P1" draw:layer="layout" svg:width="1.066cm" svg:height="0.012cm" svg:x="24.892cm" svg:y="2.591cm">
          <draw:image xlink:href="Pictures/100000000000005400000001436136F8.png" xlink:type="simple" xlink:show="embed" xlink:actuate="onLoad" draw:mime-type="image/png">
            <text:p/>
          </draw:image>
        </draw:frame>
        <draw:frame draw:style-name="gr1" draw:text-style-name="P1" draw:layer="layout" svg:width="1.066cm" svg:height="0.012cm" svg:x="24.892cm" svg:y="2.604cm">
          <draw:image xlink:href="Pictures/100000000000005400000001A66359F1.png" xlink:type="simple" xlink:show="embed" xlink:actuate="onLoad" draw:mime-type="image/png">
            <text:p/>
          </draw:image>
        </draw:frame>
        <draw:frame draw:style-name="gr1" draw:text-style-name="P1" draw:layer="layout" svg:width="1.066cm" svg:height="0.012cm" svg:x="24.892cm" svg:y="2.616cm">
          <draw:image xlink:href="Pictures/100000000000005400000001A66359F1.png" xlink:type="simple" xlink:show="embed" xlink:actuate="onLoad" draw:mime-type="image/png">
            <text:p/>
          </draw:image>
        </draw:frame>
        <draw:frame draw:style-name="gr1" draw:text-style-name="P1" draw:layer="layout" svg:width="1.066cm" svg:height="0.012cm" svg:x="24.892cm" svg:y="2.629cm">
          <draw:image xlink:href="Pictures/100000000000005400000001A66359F1.png" xlink:type="simple" xlink:show="embed" xlink:actuate="onLoad" draw:mime-type="image/png">
            <text:p/>
          </draw:image>
        </draw:frame>
        <draw:frame draw:style-name="gr1" draw:text-style-name="P1" draw:layer="layout" svg:width="1.079cm" svg:height="0.012cm" svg:x="24.892cm" svg:y="2.642cm">
          <draw:image xlink:href="Pictures/100000000000005500000001124684F8.png" xlink:type="simple" xlink:show="embed" xlink:actuate="onLoad" draw:mime-type="image/png">
            <text:p/>
          </draw:image>
        </draw:frame>
        <draw:frame draw:style-name="gr1" draw:text-style-name="P1" draw:layer="layout" svg:width="1.079cm" svg:height="0.012cm" svg:x="24.892cm" svg:y="2.654cm">
          <draw:image xlink:href="Pictures/1000000000000055000000017D7BD419.png" xlink:type="simple" xlink:show="embed" xlink:actuate="onLoad" draw:mime-type="image/png">
            <text:p/>
          </draw:image>
        </draw:frame>
        <draw:frame draw:style-name="gr1" draw:text-style-name="P1" draw:layer="layout" svg:width="1.079cm" svg:height="0.012cm" svg:x="24.892cm" svg:y="2.667cm">
          <draw:image xlink:href="Pictures/100000000000005500000001EE56284F.png" xlink:type="simple" xlink:show="embed" xlink:actuate="onLoad" draw:mime-type="image/png">
            <text:p/>
          </draw:image>
        </draw:frame>
        <draw:frame draw:style-name="gr1" draw:text-style-name="P1" draw:layer="layout" svg:width="1.079cm" svg:height="0.012cm" svg:x="24.892cm" svg:y="2.68cm">
          <draw:image xlink:href="Pictures/100000000000005500000001CE8B8F90.png" xlink:type="simple" xlink:show="embed" xlink:actuate="onLoad" draw:mime-type="image/png">
            <text:p/>
          </draw:image>
        </draw:frame>
        <draw:frame draw:style-name="gr1" draw:text-style-name="P1" draw:layer="layout" svg:width="1.079cm" svg:height="0.012cm" svg:x="24.892cm" svg:y="2.692cm">
          <draw:image xlink:href="Pictures/1000000000000055000000012141C600.png" xlink:type="simple" xlink:show="embed" xlink:actuate="onLoad" draw:mime-type="image/png">
            <text:p/>
          </draw:image>
        </draw:frame>
        <draw:frame draw:style-name="gr1" draw:text-style-name="P1" draw:layer="layout" svg:width="1.079cm" svg:height="0.012cm" svg:x="24.892cm" svg:y="2.705cm">
          <draw:image xlink:href="Pictures/100000000000005500000001E8ECBA7D.png" xlink:type="simple" xlink:show="embed" xlink:actuate="onLoad" draw:mime-type="image/png">
            <text:p/>
          </draw:image>
        </draw:frame>
        <draw:frame draw:style-name="gr1" draw:text-style-name="P1" draw:layer="layout" svg:width="1.079cm" svg:height="0.012cm" svg:x="24.892cm" svg:y="2.718cm">
          <draw:image xlink:href="Pictures/1000000000000055000000010FE82D5D.png" xlink:type="simple" xlink:show="embed" xlink:actuate="onLoad" draw:mime-type="image/png">
            <text:p/>
          </draw:image>
        </draw:frame>
        <draw:frame draw:style-name="gr1" draw:text-style-name="P1" draw:layer="layout" svg:width="1.079cm" svg:height="0.012cm" svg:x="24.892cm" svg:y="2.731cm">
          <draw:image xlink:href="Pictures/100000000000005500000001307A552F.png" xlink:type="simple" xlink:show="embed" xlink:actuate="onLoad" draw:mime-type="image/png">
            <text:p/>
          </draw:image>
        </draw:frame>
        <draw:frame draw:style-name="gr1" draw:text-style-name="P1" draw:layer="layout" svg:width="1.079cm" svg:height="0.012cm" svg:x="24.892cm" svg:y="2.743cm">
          <draw:image xlink:href="Pictures/100000000000005500000001E774B5F6.png" xlink:type="simple" xlink:show="embed" xlink:actuate="onLoad" draw:mime-type="image/png">
            <text:p/>
          </draw:image>
        </draw:frame>
        <draw:frame draw:style-name="gr1" draw:text-style-name="P1" draw:layer="layout" svg:width="1.066cm" svg:height="0.012cm" svg:x="24.892cm" svg:y="2.756cm">
          <draw:image xlink:href="Pictures/10000000000000540000000151887E0F.png" xlink:type="simple" xlink:show="embed" xlink:actuate="onLoad" draw:mime-type="image/png">
            <text:p/>
          </draw:image>
        </draw:frame>
        <draw:frame draw:style-name="gr1" draw:text-style-name="P1" draw:layer="layout" svg:width="1.053cm" svg:height="0.012cm" svg:x="24.905cm" svg:y="2.769cm">
          <draw:image xlink:href="Pictures/1000000000000053000000017B1E14E3.png" xlink:type="simple" xlink:show="embed" xlink:actuate="onLoad" draw:mime-type="image/png">
            <text:p/>
          </draw:image>
        </draw:frame>
        <draw:frame draw:style-name="gr1" draw:text-style-name="P1" draw:layer="layout" svg:width="1.04cm" svg:height="0.012cm" svg:x="24.905cm" svg:y="2.781cm">
          <draw:image xlink:href="Pictures/100000000000005200000001FA0E2910.png" xlink:type="simple" xlink:show="embed" xlink:actuate="onLoad" draw:mime-type="image/png">
            <text:p/>
          </draw:image>
        </draw:frame>
        <draw:frame draw:style-name="gr1" draw:text-style-name="P1" draw:layer="layout" svg:width="1.04cm" svg:height="0.012cm" svg:x="24.905cm" svg:y="2.794cm">
          <draw:image xlink:href="Pictures/1000000000000052000000017C3A4FBC.png" xlink:type="simple" xlink:show="embed" xlink:actuate="onLoad" draw:mime-type="image/png">
            <text:p/>
          </draw:image>
        </draw:frame>
        <draw:frame draw:style-name="gr1" draw:text-style-name="P1" draw:layer="layout" svg:width="1.015cm" svg:height="0.012cm" svg:x="24.917cm" svg:y="2.807cm">
          <draw:image xlink:href="Pictures/100000000000005000000001BC612413.png" xlink:type="simple" xlink:show="embed" xlink:actuate="onLoad" draw:mime-type="image/png">
            <text:p/>
          </draw:image>
        </draw:frame>
        <draw:frame draw:style-name="gr1" draw:text-style-name="P1" draw:layer="layout" svg:width="1.015cm" svg:height="0.012cm" svg:x="24.917cm" svg:y="2.819cm">
          <draw:image xlink:href="Pictures/10000000000000500000000181C68469.png" xlink:type="simple" xlink:show="embed" xlink:actuate="onLoad" draw:mime-type="image/png">
            <text:p/>
          </draw:image>
        </draw:frame>
        <draw:frame draw:style-name="gr1" draw:text-style-name="P1" draw:layer="layout" svg:width="0.99cm" svg:height="0.012cm" svg:x="24.93cm" svg:y="2.832cm">
          <draw:image xlink:href="Pictures/100000000000004E00000001D535AEF4.png" xlink:type="simple" xlink:show="embed" xlink:actuate="onLoad" draw:mime-type="image/png">
            <text:p/>
          </draw:image>
        </draw:frame>
        <draw:frame draw:style-name="gr1" draw:text-style-name="P1" draw:layer="layout" svg:width="0.977cm" svg:height="0.012cm" svg:x="24.943cm" svg:y="2.845cm">
          <draw:image xlink:href="Pictures/100000000000004D000000010FF9EBDA.png" xlink:type="simple" xlink:show="embed" xlink:actuate="onLoad" draw:mime-type="image/png">
            <text:p/>
          </draw:image>
        </draw:frame>
        <draw:frame draw:style-name="gr1" draw:text-style-name="P1" draw:layer="layout" svg:width="0.952cm" svg:height="0.012cm" svg:x="24.956cm" svg:y="2.858cm">
          <draw:image xlink:href="Pictures/100000000000004B000000010684FE34.png" xlink:type="simple" xlink:show="embed" xlink:actuate="onLoad" draw:mime-type="image/png">
            <text:p/>
          </draw:image>
        </draw:frame>
        <draw:frame draw:style-name="gr1" draw:text-style-name="P1" draw:layer="layout" svg:width="0.939cm" svg:height="0.012cm" svg:x="24.956cm" svg:y="2.87cm">
          <draw:image xlink:href="Pictures/100000000000004A0000000165EBE7BF.png" xlink:type="simple" xlink:show="embed" xlink:actuate="onLoad" draw:mime-type="image/png">
            <text:p/>
          </draw:image>
        </draw:frame>
        <draw:frame draw:style-name="gr1" draw:text-style-name="P1" draw:layer="layout" svg:width="0.913cm" svg:height="0.012cm" svg:x="24.968cm" svg:y="2.883cm">
          <draw:image xlink:href="Pictures/10000000000000480000000184957F6D.png" xlink:type="simple" xlink:show="embed" xlink:actuate="onLoad" draw:mime-type="image/png">
            <text:p/>
          </draw:image>
        </draw:frame>
        <draw:frame draw:style-name="gr1" draw:text-style-name="P1" draw:layer="layout" svg:width="0.024cm" svg:height="0.012cm" svg:x="25.933cm" svg:y="2.883cm">
          <draw:image xlink:href="Pictures/10000000000000020000000103A708D2.png" xlink:type="simple" xlink:show="embed" xlink:actuate="onLoad" draw:mime-type="image/png">
            <text:p/>
          </draw:image>
        </draw:frame>
        <draw:frame draw:style-name="gr1" draw:text-style-name="P1" draw:layer="layout" svg:width="0.888cm" svg:height="0.012cm" svg:x="24.981cm" svg:y="2.896cm">
          <draw:image xlink:href="Pictures/100000000000004600000001113EF3BC.png" xlink:type="simple" xlink:show="embed" xlink:actuate="onLoad" draw:mime-type="image/png">
            <text:p/>
          </draw:image>
        </draw:frame>
        <draw:frame draw:style-name="gr1" draw:text-style-name="P1" draw:layer="layout" svg:width="0.012cm" svg:height="0.012cm" svg:x="25.933cm" svg:y="2.896cm">
          <draw:image xlink:href="Pictures/100000000000000100000001177F5D20.png" xlink:type="simple" xlink:show="embed" xlink:actuate="onLoad" draw:mime-type="image/png">
            <text:p/>
          </draw:image>
        </draw:frame>
        <draw:frame draw:style-name="gr1" draw:text-style-name="P1" draw:layer="layout" svg:width="0.85cm" svg:height="0.012cm" svg:x="25.006cm" svg:y="2.908cm">
          <draw:image xlink:href="Pictures/100000000000004300000001180867AF.png" xlink:type="simple" xlink:show="embed" xlink:actuate="onLoad" draw:mime-type="image/png">
            <text:p/>
          </draw:image>
        </draw:frame>
        <draw:frame draw:style-name="gr1" draw:text-style-name="P1" draw:layer="layout" svg:width="0.012cm" svg:height="0.012cm" svg:x="25.933cm" svg:y="2.908cm">
          <draw:image xlink:href="Pictures/100000000000000100000001246D66CC.png" xlink:type="simple" xlink:show="embed" xlink:actuate="onLoad" draw:mime-type="image/png">
            <text:p/>
          </draw:image>
        </draw:frame>
        <draw:frame draw:style-name="gr1" draw:text-style-name="P1" draw:layer="layout" svg:width="0.812cm" svg:height="0.012cm" svg:x="25.019cm" svg:y="2.921cm">
          <draw:image xlink:href="Pictures/1000000000000040000000015CBD3BA6.png" xlink:type="simple" xlink:show="embed" xlink:actuate="onLoad" draw:mime-type="image/png">
            <text:p/>
          </draw:image>
        </draw:frame>
        <draw:frame draw:style-name="gr1" draw:text-style-name="P1" draw:layer="layout" svg:width="0.761cm" svg:height="0.012cm" svg:x="25.044cm" svg:y="2.934cm">
          <draw:image xlink:href="Pictures/100000000000003C0000000135495BFE.png" xlink:type="simple" xlink:show="embed" xlink:actuate="onLoad" draw:mime-type="image/png">
            <text:p/>
          </draw:image>
        </draw:frame>
        <draw:frame draw:style-name="gr1" draw:text-style-name="P1" draw:layer="layout" svg:width="0.71cm" svg:height="0.012cm" svg:x="25.07cm" svg:y="2.946cm">
          <draw:image xlink:href="Pictures/1000000000000038000000010EE93C94.png" xlink:type="simple" xlink:show="embed" xlink:actuate="onLoad" draw:mime-type="image/png">
            <text:p/>
          </draw:image>
        </draw:frame>
        <draw:frame draw:style-name="gr1" draw:text-style-name="P1" draw:layer="layout" svg:width="0.621cm" svg:height="0.012cm" svg:x="25.108cm" svg:y="2.959cm">
          <draw:image xlink:href="Pictures/1000000000000031000000019B823F53.png" xlink:type="simple" xlink:show="embed" xlink:actuate="onLoad" draw:mime-type="image/png">
            <text:p/>
          </draw:image>
        </draw:frame>
        <draw:polygon draw:style-name="gr2" draw:text-style-name="P2" draw:layer="layout" svg:width="6.337cm" svg:height="0.034cm" svg:x="4.085cm" svg:y="2.281cm" svg:viewBox="0 0 6338 35" draw:points="0,0 0,35 6338,35 6338,0">
          <text:p/>
        </draw:polygon>
        <draw:frame draw:style-name="gr1" draw:text-style-name="P1" draw:layer="layout" svg:width="12.623cm" svg:height="14.346cm" svg:x="0.94cm" svg:y="2.798cm">
          <draw:image xlink:href="Pictures/1000000000000351000003C58F8CDAC6.jpg" xlink:type="simple" xlink:show="embed" xlink:actuate="onLoad" draw:mime-type="image/jpeg">
            <text:p/>
          </draw:image>
        </draw:frame>
        <draw:frame draw:style-name="gr3" draw:text-style-name="P4" draw:layer="layout" svg:width="7.279cm" svg:height="0.674cm" svg:x="4.085cm" svg:y="1.697cm">
          <draw:text-box>
            <text:p text:style-name="P3"><text:span text:style-name="T1">3era Ronda – Fase Eliminatoria </text:span></text:p>
          </draw:text-box>
        </draw:frame>
        <draw:polygon draw:style-name="gr4" draw:text-style-name="P5" draw:layer="layout" svg:width="4.606cm" svg:height="0.664cm" svg:x="1.138cm" svg:y="17.585cm" svg:viewBox="0 0 4607 665" draw:points="0,0 0,665 4607,665 4607,0">
          <text:p/>
        </draw:polygon>
        <draw:polygon draw:style-name="gr4" draw:text-style-name="P5" draw:layer="layout" svg:width="4.242cm" svg:height="0.428cm" svg:x="1.32cm" svg:y="17.703cm" svg:viewBox="0 0 4243 429" draw:points="0,0 0,429 4243,429 4243,0">
          <text:p/>
        </draw:polygon>
        <draw:frame draw:style-name="gr5" draw:text-style-name="P6" draw:layer="layout" svg:width="0.389cm" svg:height="0.534cm" svg:x="13.564cm" svg:y="16.729cm">
          <draw:text-box>
            <text:p text:style-name="P3"><text:span text:style-name="T2"><text:s/></text:span></text:p>
          </draw:text-box>
        </draw:frame>
        <draw:polygon draw:style-name="gr6" draw:text-style-name="P7" draw:layer="layout" svg:width="7.607cm" svg:height="0.664cm" svg:x="5.761cm" svg:y="17.585cm" svg:viewBox="0 0 7608 665" draw:points="0,0 0,665 7608,665 7608,0">
          <text:p/>
        </draw:polygon>
        <draw:polygon draw:style-name="gr6" draw:text-style-name="P7" draw:layer="layout" svg:width="7.243cm" svg:height="0.597cm" svg:x="5.943cm" svg:y="17.619cm" svg:viewBox="0 0 7244 598" draw:points="0,0 0,598 7244,598 7244,0">
          <text:p/>
        </draw:polygon>
        <draw:frame draw:style-name="gr7" draw:text-style-name="P8" draw:layer="layout" svg:width="4.862cm" svg:height="0.48cm" svg:x="1.389cm" svg:y="17.663cm">
          <draw:text-box>
            <text:p text:style-name="P3"><text:span text:style-name="T3">Nombre y CI de Responsable </text:span></text:p>
          </draw:text-box>
        </draw:frame>
        <draw:polygon draw:style-name="gr8" draw:text-style-name="P9" draw:layer="layout" svg:width="0.017cm" svg:height="0.017cm" svg:x="1.121cm" svg:y="17.568cm" svg:viewBox="0 0 18 18" draw:points="0,0 0,18 18,18 18,0">
          <text:p/>
        </draw:polygon>
        <draw:polygon draw:style-name="gr8" draw:text-style-name="P9" draw:layer="layout" svg:width="0.017cm" svg:height="0.017cm" svg:x="1.121cm" svg:y="17.568cm" svg:viewBox="0 0 18 18" draw:points="0,0 0,18 18,18 18,0">
          <text:p/>
        </draw:polygon>
        <draw:polygon draw:style-name="gr8" draw:text-style-name="P9" draw:layer="layout" svg:width="4.606cm" svg:height="0.017cm" svg:x="1.138cm" svg:y="17.568cm" svg:viewBox="0 0 4607 18" draw:points="0,0 0,18 4607,18 4607,0">
          <text:p/>
        </draw:polygon>
        <draw:polygon draw:style-name="gr8" draw:text-style-name="P9" draw:layer="layout" svg:width="0.017cm" svg:height="0.017cm" svg:x="5.744cm" svg:y="17.568cm" svg:viewBox="0 0 18 18" draw:points="0,0 0,18 18,18 18,0">
          <text:p/>
        </draw:polygon>
        <draw:polygon draw:style-name="gr8" draw:text-style-name="P9" draw:layer="layout" svg:width="7.607cm" svg:height="0.017cm" svg:x="5.761cm" svg:y="17.568cm" svg:viewBox="0 0 7608 18" draw:points="0,0 0,18 7608,18 7608,0">
          <text:p/>
        </draw:polygon>
        <draw:polygon draw:style-name="gr8" draw:text-style-name="P9" draw:layer="layout" svg:width="0.017cm" svg:height="0.017cm" svg:x="13.368cm" svg:y="17.568cm" svg:viewBox="0 0 18 18" draw:points="0,0 0,18 18,18 18,0">
          <text:p/>
        </draw:polygon>
        <draw:polygon draw:style-name="gr8" draw:text-style-name="P9" draw:layer="layout" svg:width="0.017cm" svg:height="0.017cm" svg:x="13.368cm" svg:y="17.568cm" svg:viewBox="0 0 18 18" draw:points="0,0 0,18 18,18 18,0">
          <text:p/>
        </draw:polygon>
        <draw:polygon draw:style-name="gr8" draw:text-style-name="P9" draw:layer="layout" svg:width="0.017cm" svg:height="0.664cm" svg:x="1.121cm" svg:y="17.585cm" svg:viewBox="0 0 18 665" draw:points="0,0 0,665 18,665 18,0">
          <text:p/>
        </draw:polygon>
        <draw:polygon draw:style-name="gr8" draw:text-style-name="P9" draw:layer="layout" svg:width="0.017cm" svg:height="0.664cm" svg:x="5.744cm" svg:y="17.585cm" svg:viewBox="0 0 18 665" draw:points="0,0 0,665 18,665 18,0">
          <text:p/>
        </draw:polygon>
        <draw:polygon draw:style-name="gr8" draw:text-style-name="P9" draw:layer="layout" svg:width="0.017cm" svg:height="0.664cm" svg:x="13.368cm" svg:y="17.585cm" svg:viewBox="0 0 18 665" draw:points="0,0 0,665 18,665 18,0">
          <text:p/>
        </draw:polygon>
        <draw:polygon draw:style-name="gr6" draw:text-style-name="P7" draw:layer="layout" svg:width="4.606cm" svg:height="0.627cm" svg:x="1.138cm" svg:y="18.266cm" svg:viewBox="0 0 4607 628" draw:points="0,0 0,628 4607,628 4607,0">
          <text:p/>
        </draw:polygon>
        <draw:polygon draw:style-name="gr6" draw:text-style-name="P7" draw:layer="layout" svg:width="4.242cm" svg:height="0.432cm" svg:x="1.32cm" svg:y="18.364cm" svg:viewBox="0 0 4243 433" draw:points="0,0 0,433 4243,433 4243,0">
          <text:p/>
        </draw:polygon>
        <draw:frame draw:style-name="gr9" draw:text-style-name="P10" draw:layer="layout" svg:width="0.423cm" svg:height="0.577cm" svg:x="9.563cm" svg:y="17.569cm">
          <draw:text-box>
            <text:p text:style-name="P3"><text:span text:style-name="T4"><text:s/></text:span></text:p>
          </draw:text-box>
        </draw:frame>
        <draw:frame draw:style-name="gr10" draw:text-style-name="P8" draw:layer="layout" svg:width="4.748cm" svg:height="0.48cm" svg:x="1.422cm" svg:y="18.323cm">
          <draw:text-box>
            <text:p text:style-name="P3"><text:span text:style-name="T5">Nombre y CI de Participante </text:span></text:p>
          </draw:text-box>
        </draw:frame>
        <draw:polygon draw:style-name="gr8" draw:text-style-name="P9" draw:layer="layout" svg:width="0.017cm" svg:height="0.017cm" svg:x="1.121cm" svg:y="18.249cm" svg:viewBox="0 0 18 18" draw:points="0,0 0,18 18,18 18,0">
          <text:p/>
        </draw:polygon>
        <draw:polygon draw:style-name="gr8" draw:text-style-name="P9" draw:layer="layout" svg:width="4.606cm" svg:height="0.017cm" svg:x="1.138cm" svg:y="18.249cm" svg:viewBox="0 0 4607 18" draw:points="0,0 0,18 4607,18 4607,0">
          <text:p/>
        </draw:polygon>
        <draw:polygon draw:style-name="gr8" draw:text-style-name="P9" draw:layer="layout" svg:width="0.017cm" svg:height="0.017cm" svg:x="5.744cm" svg:y="18.249cm" svg:viewBox="0 0 18 18" draw:points="0,0 0,18 18,18 18,0">
          <text:p/>
        </draw:polygon>
        <draw:polygon draw:style-name="gr8" draw:text-style-name="P9" draw:layer="layout" svg:width="7.607cm" svg:height="0.017cm" svg:x="5.761cm" svg:y="18.249cm" svg:viewBox="0 0 7608 18" draw:points="0,0 0,18 7608,18 7608,0">
          <text:p/>
        </draw:polygon>
        <draw:polygon draw:style-name="gr8" draw:text-style-name="P9" draw:layer="layout" svg:width="0.017cm" svg:height="0.017cm" svg:x="13.368cm" svg:y="18.249cm" svg:viewBox="0 0 18 18" draw:points="0,0 0,18 18,18 18,0">
          <text:p/>
        </draw:polygon>
        <draw:polygon draw:style-name="gr8" draw:text-style-name="P9" draw:layer="layout" svg:width="0.017cm" svg:height="0.627cm" svg:x="1.121cm" svg:y="18.266cm" svg:viewBox="0 0 18 628" draw:points="0,0 0,628 18,628 18,0">
          <text:p/>
        </draw:polygon>
        <draw:polygon draw:style-name="gr8" draw:text-style-name="P9" draw:layer="layout" svg:width="0.017cm" svg:height="0.627cm" svg:x="5.744cm" svg:y="18.266cm" svg:viewBox="0 0 18 628" draw:points="0,0 0,628 18,628 18,0">
          <text:p/>
        </draw:polygon>
        <draw:polygon draw:style-name="gr8" draw:text-style-name="P9" draw:layer="layout" svg:width="0.017cm" svg:height="0.627cm" svg:x="13.368cm" svg:y="18.266cm" svg:viewBox="0 0 18 628" draw:points="0,0 0,628 18,628 18,0">
          <text:p/>
        </draw:polygon>
        <draw:polygon draw:style-name="gr6" draw:text-style-name="P7" draw:layer="layout" svg:width="4.606cm" svg:height="0.664cm" svg:x="1.138cm" svg:y="18.91cm" svg:viewBox="0 0 4607 665" draw:points="0,0 0,665 4607,665 4607,0">
          <text:p/>
        </draw:polygon>
        <draw:polygon draw:style-name="gr6" draw:text-style-name="P7" draw:layer="layout" svg:width="4.242cm" svg:height="0.428cm" svg:x="1.32cm" svg:y="19.028cm" svg:viewBox="0 0 4243 429" draw:points="0,0 0,429 4243,429 4243,0">
          <text:p/>
        </draw:polygon>
        <draw:frame draw:style-name="gr9" draw:text-style-name="P10" draw:layer="layout" svg:width="0.423cm" svg:height="0.577cm" svg:x="9.563cm" svg:y="18.233cm">
          <draw:text-box>
            <text:p text:style-name="P3"><text:span text:style-name="T6"><text:s/></text:span></text:p>
          </draw:text-box>
        </draw:frame>
        <draw:frame draw:style-name="gr11" draw:text-style-name="P8" draw:layer="layout" svg:width="3.084cm" svg:height="0.48cm" svg:x="2.134cm" svg:y="18.988cm">
          <draw:text-box>
            <text:p text:style-name="P3"><text:span text:style-name="T5">Tlf de Participante </text:span></text:p>
          </draw:text-box>
        </draw:frame>
        <draw:polygon draw:style-name="gr8" draw:text-style-name="P9" draw:layer="layout" svg:width="0.017cm" svg:height="0.017cm" svg:x="1.121cm" svg:y="18.893cm" svg:viewBox="0 0 18 18" draw:points="0,0 0,18 18,18 18,0">
          <text:p/>
        </draw:polygon>
        <draw:polygon draw:style-name="gr8" draw:text-style-name="P9" draw:layer="layout" svg:width="4.606cm" svg:height="0.017cm" svg:x="1.138cm" svg:y="18.893cm" svg:viewBox="0 0 4607 18" draw:points="0,0 0,18 4607,18 4607,0">
          <text:p/>
        </draw:polygon>
        <draw:polygon draw:style-name="gr8" draw:text-style-name="P9" draw:layer="layout" svg:width="0.017cm" svg:height="0.017cm" svg:x="5.744cm" svg:y="18.893cm" svg:viewBox="0 0 18 18" draw:points="0,0 0,18 18,18 18,0">
          <text:p/>
        </draw:polygon>
        <draw:polygon draw:style-name="gr8" draw:text-style-name="P9" draw:layer="layout" svg:width="7.607cm" svg:height="0.017cm" svg:x="5.761cm" svg:y="18.893cm" svg:viewBox="0 0 7608 18" draw:points="0,0 0,18 7608,18 7608,0">
          <text:p/>
        </draw:polygon>
        <draw:polygon draw:style-name="gr8" draw:text-style-name="P9" draw:layer="layout" svg:width="0.017cm" svg:height="0.017cm" svg:x="13.368cm" svg:y="18.893cm" svg:viewBox="0 0 18 18" draw:points="0,0 0,18 18,18 18,0">
          <text:p/>
        </draw:polygon>
        <draw:polygon draw:style-name="gr8" draw:text-style-name="P9" draw:layer="layout" svg:width="0.017cm" svg:height="0.664cm" svg:x="1.121cm" svg:y="18.91cm" svg:viewBox="0 0 18 665" draw:points="0,0 0,665 18,665 18,0">
          <text:p/>
        </draw:polygon>
        <draw:polygon draw:style-name="gr8" draw:text-style-name="P9" draw:layer="layout" svg:width="0.017cm" svg:height="0.664cm" svg:x="5.744cm" svg:y="18.91cm" svg:viewBox="0 0 18 665" draw:points="0,0 0,665 18,665 18,0">
          <text:p/>
        </draw:polygon>
        <draw:polygon draw:style-name="gr8" draw:text-style-name="P9" draw:layer="layout" svg:width="0.017cm" svg:height="0.664cm" svg:x="13.368cm" svg:y="18.91cm" svg:viewBox="0 0 18 665" draw:points="0,0 0,665 18,665 18,0">
          <text:p/>
        </draw:polygon>
        <draw:polygon draw:style-name="gr6" draw:text-style-name="P7" draw:layer="layout" svg:width="4.606cm" svg:height="0.699cm" svg:x="1.138cm" svg:y="19.591cm" svg:viewBox="0 0 4607 700" draw:points="0,0 0,700 4607,700 4607,0">
          <text:p/>
        </draw:polygon>
        <draw:polygon draw:style-name="gr6" draw:text-style-name="P7" draw:layer="layout" svg:width="4.242cm" svg:height="0.432cm" svg:x="1.32cm" svg:y="19.727cm" svg:viewBox="0 0 4243 433" draw:points="0,0 0,433 4243,433 4243,0">
          <text:p/>
        </draw:polygon>
        <draw:frame draw:style-name="gr9" draw:text-style-name="P10" draw:layer="layout" svg:width="0.423cm" svg:height="0.577cm" svg:x="9.563cm" svg:y="18.894cm">
          <draw:text-box>
            <text:p text:style-name="P3"><text:span text:style-name="T6"><text:s/></text:span></text:p>
          </draw:text-box>
        </draw:frame>
        <draw:frame draw:style-name="gr12" draw:text-style-name="P8" draw:layer="layout" svg:width="1.035cm" svg:height="0.48cm" svg:x="3.031cm" svg:y="19.686cm">
          <draw:text-box>
            <text:p text:style-name="P3"><text:span text:style-name="T5">Firma </text:span></text:p>
          </draw:text-box>
        </draw:frame>
        <draw:polygon draw:style-name="gr8" draw:text-style-name="P9" draw:layer="layout" svg:width="0.017cm" svg:height="0.017cm" svg:x="1.121cm" svg:y="19.574cm" svg:viewBox="0 0 18 18" draw:points="0,0 0,18 18,18 18,0">
          <text:p/>
        </draw:polygon>
        <draw:polygon draw:style-name="gr8" draw:text-style-name="P9" draw:layer="layout" svg:width="4.606cm" svg:height="0.017cm" svg:x="1.138cm" svg:y="19.574cm" svg:viewBox="0 0 4607 18" draw:points="0,0 0,18 4607,18 4607,0">
          <text:p/>
        </draw:polygon>
        <draw:polygon draw:style-name="gr8" draw:text-style-name="P9" draw:layer="layout" svg:width="0.017cm" svg:height="0.017cm" svg:x="5.744cm" svg:y="19.574cm" svg:viewBox="0 0 18 18" draw:points="0,0 0,18 18,18 18,0">
          <text:p/>
        </draw:polygon>
        <draw:polygon draw:style-name="gr8" draw:text-style-name="P9" draw:layer="layout" svg:width="7.607cm" svg:height="0.017cm" svg:x="5.761cm" svg:y="19.574cm" svg:viewBox="0 0 7608 18" draw:points="0,0 0,18 7608,18 7608,0">
          <text:p/>
        </draw:polygon>
        <draw:polygon draw:style-name="gr8" draw:text-style-name="P9" draw:layer="layout" svg:width="0.017cm" svg:height="0.017cm" svg:x="13.368cm" svg:y="19.574cm" svg:viewBox="0 0 18 18" draw:points="0,0 0,18 18,18 18,0">
          <text:p/>
        </draw:polygon>
        <draw:polygon draw:style-name="gr8" draw:text-style-name="P9" draw:layer="layout" svg:width="0.017cm" svg:height="0.703cm" svg:x="1.121cm" svg:y="19.591cm" svg:viewBox="0 0 18 704" draw:points="0,0 0,704 18,704 18,0">
          <text:p/>
        </draw:polygon>
        <draw:polygon draw:style-name="gr8" draw:text-style-name="P9" draw:layer="layout" svg:width="0.017cm" svg:height="0.017cm" svg:x="1.121cm" svg:y="20.294cm" svg:viewBox="0 0 18 18" draw:points="0,0 0,18 18,18 18,0">
          <text:p/>
        </draw:polygon>
        <draw:polygon draw:style-name="gr8" draw:text-style-name="P9" draw:layer="layout" svg:width="0.017cm" svg:height="0.017cm" svg:x="1.121cm" svg:y="20.294cm" svg:viewBox="0 0 18 18" draw:points="0,0 0,18 18,18 18,0">
          <text:p/>
        </draw:polygon>
        <draw:polygon draw:style-name="gr8" draw:text-style-name="P9" draw:layer="layout" svg:width="4.606cm" svg:height="0.017cm" svg:x="1.138cm" svg:y="20.294cm" svg:viewBox="0 0 4607 18" draw:points="0,0 0,18 4607,18 4607,0">
          <text:p/>
        </draw:polygon>
        <draw:polygon draw:style-name="gr8" draw:text-style-name="P9" draw:layer="layout" svg:width="0.017cm" svg:height="0.703cm" svg:x="5.744cm" svg:y="19.591cm" svg:viewBox="0 0 18 704" draw:points="0,0 0,704 18,704 18,0">
          <text:p/>
        </draw:polygon>
        <draw:polygon draw:style-name="gr8" draw:text-style-name="P9" draw:layer="layout" svg:width="0.017cm" svg:height="0.017cm" svg:x="5.744cm" svg:y="20.294cm" svg:viewBox="0 0 18 18" draw:points="0,0 0,18 18,18 18,0">
          <text:p/>
        </draw:polygon>
        <draw:polygon draw:style-name="gr8" draw:text-style-name="P9" draw:layer="layout" svg:width="7.607cm" svg:height="0.017cm" svg:x="5.761cm" svg:y="20.294cm" svg:viewBox="0 0 7608 18" draw:points="0,0 0,18 7608,18 7608,0">
          <text:p/>
        </draw:polygon>
        <draw:polygon draw:style-name="gr8" draw:text-style-name="P9" draw:layer="layout" svg:width="0.017cm" svg:height="0.703cm" svg:x="13.368cm" svg:y="19.591cm" svg:viewBox="0 0 18 704" draw:points="0,0 0,704 18,704 18,0">
          <text:p/>
        </draw:polygon>
        <draw:polygon draw:style-name="gr8" draw:text-style-name="P9" draw:layer="layout" svg:width="0.017cm" svg:height="0.017cm" svg:x="13.368cm" svg:y="20.294cm" svg:viewBox="0 0 18 18" draw:points="0,0 0,18 18,18 18,0">
          <text:p/>
        </draw:polygon>
        <draw:polygon draw:style-name="gr8" draw:text-style-name="P9" draw:layer="layout" svg:width="0.017cm" svg:height="0.017cm" svg:x="13.368cm" svg:y="20.294cm" svg:viewBox="0 0 18 18" draw:points="0,0 0,18 18,18 18,0">
          <text:p/>
        </draw:polygon>
        <draw:frame draw:style-name="gr9" draw:text-style-name="P10" draw:layer="layout" svg:width="0.423cm" svg:height="0.577cm" svg:x="9.563cm" svg:y="19.597cm">
          <draw:text-box>
            <text:p text:style-name="P3"><text:span text:style-name="T6"><text:s/></text:span></text:p>
          </draw:text-box>
        </draw:frame>
        <draw:polygon draw:style-name="gr13" draw:text-style-name="P11" draw:layer="layout" svg:width="6.494cm" svg:height="0.047cm" svg:x="16.882cm" svg:y="2.277cm" svg:viewBox="0 0 6495 48" draw:points="0,0 0,48 6495,48 6495,0">
          <text:p/>
        </draw:polygon>
        <draw:frame draw:style-name="gr14" draw:text-style-name="P4" draw:layer="layout" svg:width="6.123cm" svg:height="0.674cm" svg:x="16.883cm" svg:y="1.714cm">
          <draw:text-box>
            <text:p text:style-name="P3"><text:span text:style-name="T7">QUINIELA MUNDIAL 2026 </text:span></text:p>
          </draw:text-box>
        </draw:frame>
        <draw:polygon draw:style-name="gr2" draw:text-style-name="P2" draw:layer="layout" svg:width="3.734cm" svg:height="0.034cm" svg:x="18.884cm" svg:y="2.726cm" svg:viewBox="0 0 3735 35" draw:points="0,0 0,35 3735,35 3735,0">
          <text:p/>
        </draw:polygon>
        <draw:frame draw:style-name="gr1" draw:text-style-name="P1" draw:layer="layout" svg:width="10.764cm" svg:height="15.916cm" svg:x="15.371cm" svg:y="3.264cm">
          <draw:image xlink:href="Pictures/10000000000002DB0000043AA241C0FC.jpg" xlink:type="simple" xlink:show="embed" xlink:actuate="onLoad" draw:mime-type="image/jpeg">
            <text:p/>
          </draw:image>
        </draw:frame>
        <draw:frame draw:style-name="gr15" draw:text-style-name="P8" draw:layer="layout" svg:width="3.439cm" svg:height="0.48cm" svg:x="18.885cm" svg:y="2.325cm">
          <draw:text-box>
            <text:p text:style-name="P3"><text:span text:style-name="T5">FASE ELIMINATORIA </text:span></text:p>
          </draw:text-box>
        </draw:frame>
        <draw:frame draw:style-name="gr16" draw:text-style-name="P10" draw:layer="layout" svg:width="0.423cm" svg:height="0.424cm" svg:x="26.137cm" svg:y="18.892cm">
          <draw:text-box>
            <text:p text:style-name="P3"><text:span text:style-name="T8"><text:s/></text:span></text:p>
          </draw:text-box>
        </draw:frame>
        <draw:frame draw:style-name="gr17" draw:text-style-name="P10" draw:layer="layout" svg:width="8.164cm" svg:height="0.577cm" svg:x="17.192cm" svg:y="19.63cm">
          <draw:text-box>
            <text:p text:style-name="P3"><text:span text:style-name="T9">Fecha Tope de Entrega: 05 de Junio 2026 </text:span></text:p>
          </draw:text-box>
        </draw:frame>
        <draw:frame draw:style-name="gr18" draw:text-style-name="P12" draw:layer="layout" svg:width="0.6cm" svg:height="0.823cm" svg:x="12.9cm" svg:y="4.3cm">
          <draw:text-box>
            <text:p><text:span text:style-name="T10">2</text:span></text:p>
            <text:p><text:span text:style-name="T10">0</text:span></text:p>
          </draw:text-box>
        </draw:frame>
        <draw:frame draw:style-name="gr18" draw:text-style-name="P12" draw:layer="layout" svg:width="0.6cm" svg:height="0.823cm" svg:x="12.9cm" svg:y="3.1cm">
          <draw:text-box>
            <text:p><text:span text:style-name="T10">1</text:span></text:p>
            <text:p><text:span text:style-name="T10">2</text:span></text:p>
          </draw:text-box>
        </draw:frame>
        <draw:frame draw:style-name="gr18" draw:text-style-name="P12" draw:layer="layout" svg:width="0.6cm" svg:height="0.823cm" svg:x="12.9cm" svg:y="6.701cm">
          <draw:text-box>
            <text:p><text:span text:style-name="T10">1</text:span></text:p>
            <text:p><text:span text:style-name="T10">1</text:span></text:p>
          </draw:text-box>
        </draw:frame>
        <draw:frame draw:style-name="gr18" draw:text-style-name="P12" draw:layer="layout" svg:width="0.6cm" svg:height="0.823cm" svg:x="12.9cm" svg:y="5.501cm">
          <draw:text-box>
            <text:p><text:span text:style-name="T10">1</text:span></text:p>
            <text:p><text:span text:style-name="T10">1</text:span></text:p>
          </draw:text-box>
        </draw:frame>
        <draw:frame draw:style-name="gr18" draw:text-style-name="P12" draw:layer="layout" svg:width="0.6cm" svg:height="0.823cm" svg:x="12.9cm" svg:y="9.102cm">
          <draw:text-box>
            <text:p><text:span text:style-name="T10">1</text:span></text:p>
            <text:p><text:span text:style-name="T10">1</text:span></text:p>
          </draw:text-box>
        </draw:frame>
        <draw:frame draw:style-name="gr18" draw:text-style-name="P12" draw:layer="layout" svg:width="0.6cm" svg:height="0.823cm" svg:x="12.9cm" svg:y="7.902cm">
          <draw:text-box>
            <text:p><text:span text:style-name="T10">0</text:span></text:p>
            <text:p><text:span text:style-name="T10">3</text:span></text:p>
          </draw:text-box>
        </draw:frame>
        <draw:frame draw:style-name="gr18" draw:text-style-name="P12" draw:layer="layout" svg:width="0.6cm" svg:height="0.823cm" svg:x="12.9cm" svg:y="11.503cm">
          <draw:text-box>
            <text:p><text:span text:style-name="T10">1</text:span></text:p>
            <text:p><text:span text:style-name="T10">1</text:span></text:p>
          </draw:text-box>
        </draw:frame>
        <draw:frame draw:style-name="gr18" draw:text-style-name="P12" draw:layer="layout" svg:width="0.6cm" svg:height="0.823cm" svg:x="12.9cm" svg:y="10.303cm">
          <draw:text-box>
            <text:p><text:span text:style-name="T10">0</text:span></text:p>
            <text:p><text:span text:style-name="T10">4</text:span></text:p>
          </draw:text-box>
        </draw:frame>
        <draw:frame draw:style-name="gr18" draw:text-style-name="P12" draw:layer="layout" svg:width="0.6cm" svg:height="0.823cm" svg:x="12.9cm" svg:y="13.904cm">
          <draw:text-box>
            <text:p><text:span text:style-name="T10">1</text:span></text:p>
            <text:p><text:span text:style-name="T10">1</text:span></text:p>
          </draw:text-box>
        </draw:frame>
        <draw:frame draw:style-name="gr18" draw:text-style-name="P12" draw:layer="layout" svg:width="0.6cm" svg:height="0.823cm" svg:x="12.9cm" svg:y="12.704cm">
          <draw:text-box>
            <text:p><text:span text:style-name="T10">1</text:span></text:p>
            <text:p><text:span text:style-name="T10">1</text:span></text:p>
          </draw:text-box>
        </draw:frame>
        <draw:frame draw:style-name="gr18" draw:text-style-name="P12" draw:layer="layout" svg:width="0.6cm" svg:height="0.823cm" svg:x="12.9cm" svg:y="16.305cm">
          <draw:text-box>
            <text:p><text:span text:style-name="T10">0</text:span></text:p>
            <text:p><text:span text:style-name="T10">3</text:span></text:p>
          </draw:text-box>
        </draw:frame>
        <draw:frame draw:style-name="gr18" draw:text-style-name="P12" draw:layer="layout" svg:width="0.6cm" svg:height="0.823cm" svg:x="12.9cm" svg:y="15.105cm">
          <draw:text-box>
            <text:p><text:span text:style-name="T10">1</text:span></text:p>
            <text:p><text:span text:style-name="T10">1</text:span></text:p>
          </draw:text-box>
        </draw:frame>
        <draw:frame draw:style-name="gr18" draw:text-style-name="P12" draw:layer="layout" svg:width="0.6cm" svg:height="0.823cm" svg:x="5.5cm" svg:y="4.3cm">
          <draw:text-box>
            <text:p><text:span text:style-name="T10">1</text:span></text:p>
            <text:p><text:span text:style-name="T10">1</text:span></text:p>
          </draw:text-box>
        </draw:frame>
        <draw:frame draw:style-name="gr18" draw:text-style-name="P12" draw:layer="layout" svg:width="0.6cm" svg:height="0.823cm" svg:x="5.5cm" svg:y="3.1cm">
          <draw:text-box>
            <text:p><text:span text:style-name="T10">2</text:span></text:p>
            <text:p><text:span text:style-name="T10">2</text:span></text:p>
          </draw:text-box>
        </draw:frame>
        <draw:frame draw:style-name="gr18" draw:text-style-name="P12" draw:layer="layout" svg:width="0.6cm" svg:height="0.823cm" svg:x="5.5cm" svg:y="6.701cm">
          <draw:text-box>
            <text:p><text:span text:style-name="T10">1</text:span></text:p>
            <text:p><text:span text:style-name="T10">2</text:span></text:p>
          </draw:text-box>
        </draw:frame>
        <draw:frame draw:style-name="gr18" draw:text-style-name="P12" draw:layer="layout" svg:width="0.6cm" svg:height="0.823cm" svg:x="5.5cm" svg:y="5.501cm">
          <draw:text-box>
            <text:p><text:span text:style-name="T10">3</text:span></text:p>
            <text:p><text:span text:style-name="T10">0</text:span></text:p>
          </draw:text-box>
        </draw:frame>
        <draw:frame draw:style-name="gr18" draw:text-style-name="P12" draw:layer="layout" svg:width="0.6cm" svg:height="0.823cm" svg:x="5.5cm" svg:y="9.102cm">
          <draw:text-box>
            <text:p><text:span text:style-name="T10">1</text:span></text:p>
            <text:p><text:span text:style-name="T10">2</text:span></text:p>
          </draw:text-box>
        </draw:frame>
        <draw:frame draw:style-name="gr18" draw:text-style-name="P12" draw:layer="layout" svg:width="0.6cm" svg:height="0.823cm" svg:x="5.5cm" svg:y="7.902cm">
          <draw:text-box>
            <text:p><text:span text:style-name="T10">0</text:span></text:p>
            <text:p><text:span text:style-name="T10">1</text:span></text:p>
          </draw:text-box>
        </draw:frame>
        <draw:frame draw:style-name="gr18" draw:text-style-name="P12" draw:layer="layout" svg:width="0.6cm" svg:height="0.823cm" svg:x="5.5cm" svg:y="11.503cm">
          <draw:text-box>
            <text:p><text:span text:style-name="T10">1</text:span></text:p>
            <text:p><text:span text:style-name="T10">1</text:span></text:p>
          </draw:text-box>
        </draw:frame>
        <draw:frame draw:style-name="gr18" draw:text-style-name="P12" draw:layer="layout" svg:width="0.6cm" svg:height="0.823cm" svg:x="5.5cm" svg:y="10.303cm">
          <draw:text-box>
            <text:p><text:span text:style-name="T10">0</text:span></text:p>
            <text:p><text:span text:style-name="T10">2</text:span></text:p>
          </draw:text-box>
        </draw:frame>
        <draw:frame draw:style-name="gr18" draw:text-style-name="P12" draw:layer="layout" svg:width="0.6cm" svg:height="0.823cm" svg:x="5.5cm" svg:y="13.904cm">
          <draw:text-box>
            <text:p><text:span text:style-name="T10">1</text:span></text:p>
            <text:p><text:span text:style-name="T10">0</text:span></text:p>
          </draw:text-box>
        </draw:frame>
        <draw:frame draw:style-name="gr18" draw:text-style-name="P12" draw:layer="layout" svg:width="0.6cm" svg:height="0.823cm" svg:x="5.5cm" svg:y="12.704cm">
          <draw:text-box>
            <text:p><text:span text:style-name="T10">0</text:span></text:p>
            <text:p><text:span text:style-name="T10">2</text:span></text:p>
          </draw:text-box>
        </draw:frame>
        <draw:frame draw:style-name="gr18" draw:text-style-name="P12" draw:layer="layout" svg:width="0.6cm" svg:height="0.823cm" svg:x="5.5cm" svg:y="16.305cm">
          <draw:text-box>
            <text:p><text:span text:style-name="T10">1</text:span></text:p>
            <text:p><text:span text:style-name="T10">1</text:span></text:p>
          </draw:text-box>
        </draw:frame>
        <draw:frame draw:style-name="gr18" draw:text-style-name="P12" draw:layer="layout" svg:width="0.6cm" svg:height="0.823cm" svg:x="5.5cm" svg:y="15.105cm">
          <draw:text-box>
            <text:p><text:span text:style-name="T10">1</text:span></text:p>
            <text:p><text:span text:style-name="T10">1</text:span></text:p>
          </draw:text-box>
        </draw:frame>
        <draw:frame draw:style-name="gr19" draw:text-style-name="P12" draw:layer="layout" svg:width="6.35cm" svg:height="0.412cm" svg:x="6.7cm" svg:y="18.406cm">
          <draw:text-box>
            <text:p><text:span text:style-name="T10">Jefferson Maldonado <text:s text:c="8"/>V-14.974.881</text:span></text:p>
          </draw:text-box>
        </draw:frame>
        <draw:frame draw:style-name="gr19" draw:text-style-name="P12" draw:layer="layout" svg:width="6.35cm" svg:height="0.412cm" svg:x="6.694cm" svg:y="19.006cm">
          <draw:text-box>
            <text:p><text:span text:style-name="T10">0414-745 3501</text:span></text:p>
          </draw:text-box>
        </draw:frame>
        <draw:frame draw:style-name="gr20" draw:text-style-name="P13" draw:layer="layout" svg:width="1.59cm" svg:height="1.25cm" svg:x="6.929cm" svg:y="19.55cm">
          <draw:image xlink:href="Pictures/100000010000057100000447E6E43B5F.png" xlink:type="simple" xlink:show="embed" xlink:actuate="onLoad" draw:mime-type="image/png">
            <text:p/>
          </draw:image>
        </draw:frame>
      </draw:page>
      <draw:page draw:name="page2" draw:style-name="dp1" draw:master-page-name="master-page48">
        <draw:frame draw:style-name="gr21" draw:text-style-name="P14" draw:layer="layout" svg:width="0.351cm" svg:height="0.509cm" svg:x="7.38cm" svg:y="1.728cm">
          <draw:text-box>
            <text:p text:style-name="P3"><text:span text:style-name="T11"><text:s/></text:span></text:p>
          </draw:text-box>
        </draw:frame>
        <draw:polygon draw:style-name="gr2" draw:text-style-name="P2" draw:layer="layout" svg:width="6.337cm" svg:height="0.034cm" svg:x="4.085cm" svg:y="2.768cm" svg:viewBox="0 0 6338 35" draw:points="0,0 0,35 6338,35 6338,0">
          <text:p/>
        </draw:polygon>
        <draw:frame draw:style-name="gr1" draw:text-style-name="P1" draw:layer="layout" svg:width="12.623cm" svg:height="14.346cm" svg:x="0.94cm" svg:y="3.289cm">
          <draw:image xlink:href="Pictures/1000000000000351000003C52DF21F10.jpg" xlink:type="simple" xlink:show="embed" xlink:actuate="onLoad" draw:mime-type="image/jpeg">
            <text:p/>
          </draw:image>
        </draw:frame>
        <draw:frame draw:style-name="gr3" draw:text-style-name="P4" draw:layer="layout" svg:width="7.279cm" svg:height="0.674cm" svg:x="4.085cm" svg:y="2.184cm">
          <draw:text-box>
            <text:p text:style-name="P3"><text:span text:style-name="T1">1era Ronda – Fase Eliminatoria </text:span></text:p>
          </draw:text-box>
        </draw:frame>
        <draw:frame draw:style-name="gr5" draw:text-style-name="P6" draw:layer="layout" svg:width="0.389cm" svg:height="0.534cm" svg:x="13.564cm" svg:y="17.22cm">
          <draw:text-box>
            <text:p text:style-name="P3"><text:span text:style-name="T2"><text:s/></text:span></text:p>
          </draw:text-box>
        </draw:frame>
        <draw:frame draw:style-name="gr9" draw:text-style-name="P10" draw:layer="layout" svg:width="0.423cm" svg:height="0.577cm" svg:x="7.252cm" svg:y="18.03cm">
          <draw:text-box>
            <text:p text:style-name="P3"><text:span text:style-name="T4"><text:s/></text:span></text:p>
          </draw:text-box>
        </draw:frame>
        <draw:frame draw:style-name="gr9" draw:text-style-name="P10" draw:layer="layout" svg:width="0.423cm" svg:height="0.577cm" svg:x="7.252cm" svg:y="18.966cm">
          <draw:text-box>
            <text:p text:style-name="P3"><text:span text:style-name="T4"><text:s/></text:span></text:p>
          </draw:text-box>
        </draw:frame>
        <draw:frame draw:style-name="gr5" draw:text-style-name="P6" draw:layer="layout" svg:width="0.389cm" svg:height="0.534cm" svg:x="7.252cm" svg:y="19.48cm">
          <draw:text-box>
            <text:p text:style-name="P3"><text:span text:style-name="T2"><text:s/></text:span></text:p>
          </draw:text-box>
        </draw:frame>
        <draw:frame draw:style-name="gr5" draw:text-style-name="P6" draw:layer="layout" svg:width="0.389cm" svg:height="0.534cm" svg:x="20.752cm" svg:y="1.721cm">
          <draw:text-box>
            <text:p text:style-name="P3"><text:span text:style-name="T2"><text:s/></text:span></text:p>
          </draw:text-box>
        </draw:frame>
        <draw:polygon draw:style-name="gr2" draw:text-style-name="P2" draw:layer="layout" svg:width="6.181cm" svg:height="0.034cm" svg:x="17.661cm" svg:y="2.747cm" svg:viewBox="0 0 6182 35" draw:points="0,0 0,35 6182,35 6182,0">
          <text:p/>
        </draw:polygon>
        <draw:frame draw:style-name="gr1" draw:text-style-name="P1" draw:layer="layout" svg:width="12.623cm" svg:height="14.346cm" svg:x="14.44cm" svg:y="3.268cm">
          <draw:image xlink:href="Pictures/1000000000000351000003C58244125D.jpg" xlink:type="simple" xlink:show="embed" xlink:actuate="onLoad" draw:mime-type="image/jpeg">
            <text:p/>
          </draw:image>
        </draw:frame>
        <draw:frame draw:style-name="gr22" draw:text-style-name="P4" draw:layer="layout" svg:width="7.101cm" svg:height="0.674cm" svg:x="17.661cm" svg:y="2.163cm">
          <draw:text-box>
            <text:p text:style-name="P3"><text:span text:style-name="T1">2da Ronda – Fase Eliminatoria </text:span></text:p>
          </draw:text-box>
        </draw:frame>
        <draw:frame draw:style-name="gr9" draw:text-style-name="P10" draw:layer="layout" svg:width="0.423cm" svg:height="0.577cm" svg:x="27.064cm" svg:y="17.162cm">
          <draw:text-box>
            <text:p text:style-name="P3"><text:span text:style-name="T4"><text:s/></text:span></text:p>
          </draw:text-box>
        </draw:frame>
        <draw:frame draw:style-name="gr9" draw:text-style-name="P10" draw:layer="layout" svg:width="0.423cm" svg:height="0.577cm" svg:x="20.752cm" svg:y="18.013cm">
          <draw:text-box>
            <text:p text:style-name="P3"><text:span text:style-name="T4"><text:s/></text:span></text:p>
          </draw:text-box>
        </draw:frame>
        <draw:frame draw:style-name="gr18" draw:text-style-name="P12" draw:layer="layout" svg:width="0.6cm" svg:height="0.823cm" svg:x="5.5cm" svg:y="3.601cm">
          <draw:text-box>
            <text:p><text:span text:style-name="T10">2</text:span></text:p>
            <text:p><text:span text:style-name="T10">0</text:span></text:p>
          </draw:text-box>
        </draw:frame>
        <draw:frame draw:style-name="gr18" draw:text-style-name="P12" draw:layer="layout" svg:width="0.6cm" svg:height="0.823cm" svg:x="5.5cm" svg:y="4.802cm">
          <draw:text-box>
            <text:p><text:span text:style-name="T10">1</text:span></text:p>
            <text:p><text:span text:style-name="T10">1</text:span></text:p>
          </draw:text-box>
        </draw:frame>
        <draw:frame draw:style-name="gr18" draw:text-style-name="P12" draw:layer="layout" svg:width="0.6cm" svg:height="0.823cm" svg:x="5.5cm" svg:y="3.602cm">
          <draw:text-box>
            <text:p><text:span text:style-name="T10">2</text:span></text:p>
            <text:p><text:span text:style-name="T10">0</text:span></text:p>
          </draw:text-box>
        </draw:frame>
        <draw:frame draw:style-name="gr18" draw:text-style-name="P12" draw:layer="layout" svg:width="0.6cm" svg:height="0.823cm" svg:x="5.5cm" svg:y="7.203cm">
          <draw:text-box>
            <text:p><text:span text:style-name="T10">3</text:span></text:p>
            <text:p><text:span text:style-name="T10">1</text:span></text:p>
          </draw:text-box>
        </draw:frame>
        <draw:frame draw:style-name="gr18" draw:text-style-name="P12" draw:layer="layout" svg:width="0.6cm" svg:height="0.823cm" svg:x="5.5cm" svg:y="6.003cm">
          <draw:text-box>
            <text:p><text:span text:style-name="T10">2</text:span></text:p>
            <text:p><text:span text:style-name="T10">1</text:span></text:p>
          </draw:text-box>
        </draw:frame>
        <draw:frame draw:style-name="gr18" draw:text-style-name="P12" draw:layer="layout" svg:width="0.6cm" svg:height="0.823cm" svg:x="5.5cm" svg:y="9.604cm">
          <draw:text-box>
            <text:p><text:span text:style-name="T10">1</text:span></text:p>
            <text:p><text:span text:style-name="T10">1</text:span></text:p>
          </draw:text-box>
        </draw:frame>
        <draw:frame draw:style-name="gr18" draw:text-style-name="P12" draw:layer="layout" svg:width="0.6cm" svg:height="0.823cm" svg:x="5.5cm" svg:y="8.404cm">
          <draw:text-box>
            <text:p><text:span text:style-name="T10">0</text:span></text:p>
            <text:p><text:span text:style-name="T10">2</text:span></text:p>
          </draw:text-box>
        </draw:frame>
        <draw:frame draw:style-name="gr18" draw:text-style-name="P12" draw:layer="layout" svg:width="0.6cm" svg:height="0.823cm" svg:x="5.5cm" svg:y="12.005cm">
          <draw:text-box>
            <text:p><text:span text:style-name="T10">1</text:span></text:p>
            <text:p><text:span text:style-name="T10">2</text:span></text:p>
          </draw:text-box>
        </draw:frame>
        <draw:frame draw:style-name="gr18" draw:text-style-name="P12" draw:layer="layout" svg:width="0.6cm" svg:height="0.823cm" svg:x="5.5cm" svg:y="10.805cm">
          <draw:text-box>
            <text:p><text:span text:style-name="T10">0</text:span></text:p>
            <text:p><text:span text:style-name="T10">2</text:span></text:p>
          </draw:text-box>
        </draw:frame>
        <draw:frame draw:style-name="gr18" draw:text-style-name="P12" draw:layer="layout" svg:width="0.6cm" svg:height="0.823cm" svg:x="5.5cm" svg:y="14.406cm">
          <draw:text-box>
            <text:p><text:span text:style-name="T10">3</text:span></text:p>
            <text:p><text:span text:style-name="T10">1</text:span></text:p>
          </draw:text-box>
        </draw:frame>
        <draw:frame draw:style-name="gr18" draw:text-style-name="P12" draw:layer="layout" svg:width="0.6cm" svg:height="0.823cm" svg:x="5.5cm" svg:y="13.206cm">
          <draw:text-box>
            <text:p><text:span text:style-name="T10">3</text:span></text:p>
            <text:p><text:span text:style-name="T10">0</text:span></text:p>
          </draw:text-box>
        </draw:frame>
        <draw:frame draw:style-name="gr18" draw:text-style-name="P12" draw:layer="layout" svg:width="0.6cm" svg:height="0.823cm" svg:x="5.5cm" svg:y="16.807cm">
          <draw:text-box>
            <text:p><text:span text:style-name="T10">2</text:span></text:p>
            <text:p><text:span text:style-name="T10">0</text:span></text:p>
          </draw:text-box>
        </draw:frame>
        <draw:frame draw:style-name="gr18" draw:text-style-name="P12" draw:layer="layout" svg:width="0.6cm" svg:height="0.823cm" svg:x="5.5cm" svg:y="15.607cm">
          <draw:text-box>
            <text:p><text:span text:style-name="T10">1</text:span></text:p>
            <text:p><text:span text:style-name="T10">2</text:span></text:p>
          </draw:text-box>
        </draw:frame>
        <draw:frame draw:style-name="gr18" draw:text-style-name="P12" draw:layer="layout" svg:width="0.6cm" svg:height="0.823cm" svg:x="12.9cm" svg:y="4.802cm">
          <draw:text-box>
            <text:p><text:span text:style-name="T10">2</text:span></text:p>
            <text:p><text:span text:style-name="T10">1</text:span></text:p>
          </draw:text-box>
        </draw:frame>
        <draw:frame draw:style-name="gr18" draw:text-style-name="P12" draw:layer="layout" svg:width="0.6cm" svg:height="0.823cm" svg:x="12.9cm" svg:y="3.602cm">
          <draw:text-box>
            <text:p><text:span text:style-name="T10">3</text:span></text:p>
            <text:p><text:span text:style-name="T10">0</text:span></text:p>
          </draw:text-box>
        </draw:frame>
        <draw:frame draw:style-name="gr18" draw:text-style-name="P12" draw:layer="layout" svg:width="0.6cm" svg:height="0.823cm" svg:x="12.9cm" svg:y="7.203cm">
          <draw:text-box>
            <text:p><text:span text:style-name="T10">1</text:span></text:p>
            <text:p><text:span text:style-name="T10">0</text:span></text:p>
          </draw:text-box>
        </draw:frame>
        <draw:frame draw:style-name="gr18" draw:text-style-name="P12" draw:layer="layout" svg:width="0.6cm" svg:height="0.823cm" svg:x="12.9cm" svg:y="6.003cm">
          <draw:text-box>
            <text:p><text:span text:style-name="T10">1</text:span></text:p>
            <text:p><text:span text:style-name="T10">2</text:span></text:p>
          </draw:text-box>
        </draw:frame>
        <draw:frame draw:style-name="gr18" draw:text-style-name="P12" draw:layer="layout" svg:width="0.6cm" svg:height="0.823cm" svg:x="12.9cm" svg:y="9.604cm">
          <draw:text-box>
            <text:p><text:span text:style-name="T10">1</text:span></text:p>
            <text:p><text:span text:style-name="T10">3</text:span></text:p>
          </draw:text-box>
        </draw:frame>
        <draw:frame draw:style-name="gr18" draw:text-style-name="P12" draw:layer="layout" svg:width="0.6cm" svg:height="0.823cm" svg:x="12.9cm" svg:y="8.404cm">
          <draw:text-box>
            <text:p><text:span text:style-name="T10">2</text:span></text:p>
            <text:p><text:span text:style-name="T10">0</text:span></text:p>
          </draw:text-box>
        </draw:frame>
        <draw:frame draw:style-name="gr18" draw:text-style-name="P12" draw:layer="layout" svg:width="0.6cm" svg:height="0.823cm" svg:x="12.9cm" svg:y="12.005cm">
          <draw:text-box>
            <text:p><text:span text:style-name="T10">2</text:span></text:p>
            <text:p><text:span text:style-name="T10">0</text:span></text:p>
          </draw:text-box>
        </draw:frame>
        <draw:frame draw:style-name="gr18" draw:text-style-name="P12" draw:layer="layout" svg:width="0.6cm" svg:height="0.823cm" svg:x="12.9cm" svg:y="10.805cm">
          <draw:text-box>
            <text:p><text:span text:style-name="T10">2</text:span></text:p>
            <text:p><text:span text:style-name="T10">0</text:span></text:p>
          </draw:text-box>
        </draw:frame>
        <draw:frame draw:style-name="gr18" draw:text-style-name="P12" draw:layer="layout" svg:width="0.6cm" svg:height="0.823cm" svg:x="12.9cm" svg:y="14.406cm">
          <draw:text-box>
            <text:p><text:span text:style-name="T10">2</text:span></text:p>
            <text:p><text:span text:style-name="T10">2</text:span></text:p>
          </draw:text-box>
        </draw:frame>
        <draw:frame draw:style-name="gr18" draw:text-style-name="P12" draw:layer="layout" svg:width="0.6cm" svg:height="0.823cm" svg:x="12.9cm" svg:y="13.206cm">
          <draw:text-box>
            <text:p><text:span text:style-name="T10">3</text:span></text:p>
            <text:p><text:span text:style-name="T10">0</text:span></text:p>
          </draw:text-box>
        </draw:frame>
        <draw:frame draw:style-name="gr18" draw:text-style-name="P12" draw:layer="layout" svg:width="0.6cm" svg:height="0.823cm" svg:x="12.9cm" svg:y="16.807cm">
          <draw:text-box>
            <text:p><text:span text:style-name="T10">0</text:span></text:p>
            <text:p><text:span text:style-name="T10">2</text:span></text:p>
          </draw:text-box>
        </draw:frame>
        <draw:frame draw:style-name="gr18" draw:text-style-name="P12" draw:layer="layout" svg:width="0.6cm" svg:height="0.823cm" svg:x="12.9cm" svg:y="15.607cm">
          <draw:text-box>
            <text:p><text:span text:style-name="T10">1</text:span></text:p>
            <text:p><text:span text:style-name="T10">1</text:span></text:p>
          </draw:text-box>
        </draw:frame>
        <draw:frame draw:style-name="gr18" draw:text-style-name="P12" draw:layer="layout" svg:width="0.6cm" svg:height="0.823cm" svg:x="19cm" svg:y="4.702cm">
          <draw:text-box>
            <text:p><text:span text:style-name="T10">1</text:span></text:p>
            <text:p><text:span text:style-name="T10">1</text:span></text:p>
          </draw:text-box>
        </draw:frame>
        <draw:frame draw:style-name="gr18" draw:text-style-name="P12" draw:layer="layout" svg:width="0.6cm" svg:height="0.823cm" svg:x="19cm" svg:y="3.602cm">
          <draw:text-box>
            <text:p><text:span text:style-name="T10">0</text:span></text:p>
            <text:p><text:span text:style-name="T10">2</text:span></text:p>
          </draw:text-box>
        </draw:frame>
        <draw:frame draw:style-name="gr18" draw:text-style-name="P12" draw:layer="layout" svg:width="0.6cm" svg:height="0.823cm" svg:x="19cm" svg:y="7.203cm">
          <draw:text-box>
            <text:p><text:span text:style-name="T10">1</text:span></text:p>
            <text:p><text:span text:style-name="T10">1</text:span></text:p>
          </draw:text-box>
        </draw:frame>
        <draw:frame draw:style-name="gr18" draw:text-style-name="P12" draw:layer="layout" svg:width="0.6cm" svg:height="0.823cm" svg:x="19cm" svg:y="6.003cm">
          <draw:text-box>
            <text:p><text:span text:style-name="T10">3</text:span></text:p>
            <text:p><text:span text:style-name="T10">0</text:span></text:p>
          </draw:text-box>
        </draw:frame>
        <draw:frame draw:style-name="gr18" draw:text-style-name="P12" draw:layer="layout" svg:width="0.6cm" svg:height="0.823cm" svg:x="19cm" svg:y="9.604cm">
          <draw:text-box>
            <text:p><text:span text:style-name="T10">0</text:span></text:p>
            <text:p><text:span text:style-name="T10">2</text:span></text:p>
          </draw:text-box>
        </draw:frame>
        <draw:frame draw:style-name="gr18" draw:text-style-name="P12" draw:layer="layout" svg:width="0.6cm" svg:height="0.823cm" svg:x="19cm" svg:y="8.404cm">
          <draw:text-box>
            <text:p><text:span text:style-name="T10">2</text:span></text:p>
            <text:p><text:span text:style-name="T10">0</text:span></text:p>
          </draw:text-box>
        </draw:frame>
        <draw:frame draw:style-name="gr18" draw:text-style-name="P12" draw:layer="layout" svg:width="0.6cm" svg:height="0.823cm" svg:x="19cm" svg:y="12.005cm">
          <draw:text-box>
            <text:p><text:span text:style-name="T10">2</text:span></text:p>
            <text:p><text:span text:style-name="T10">1</text:span></text:p>
          </draw:text-box>
        </draw:frame>
        <draw:frame draw:style-name="gr18" draw:text-style-name="P12" draw:layer="layout" svg:width="0.6cm" svg:height="0.823cm" svg:x="19cm" svg:y="10.805cm">
          <draw:text-box>
            <text:p><text:span text:style-name="T10">3</text:span></text:p>
            <text:p><text:span text:style-name="T10">0</text:span></text:p>
          </draw:text-box>
        </draw:frame>
        <draw:frame draw:style-name="gr18" draw:text-style-name="P12" draw:layer="layout" svg:width="0.6cm" svg:height="0.823cm" svg:x="19cm" svg:y="14.406cm">
          <draw:text-box>
            <text:p><text:span text:style-name="T10">2</text:span></text:p>
            <text:p><text:span text:style-name="T10">1</text:span></text:p>
          </draw:text-box>
        </draw:frame>
        <draw:frame draw:style-name="gr18" draw:text-style-name="P12" draw:layer="layout" svg:width="0.6cm" svg:height="0.823cm" svg:x="19cm" svg:y="13.206cm">
          <draw:text-box>
            <text:p><text:span text:style-name="T10">2</text:span></text:p>
            <text:p><text:span text:style-name="T10">1</text:span></text:p>
          </draw:text-box>
        </draw:frame>
        <draw:frame draw:style-name="gr18" draw:text-style-name="P12" draw:layer="layout" svg:width="0.6cm" svg:height="0.823cm" svg:x="19cm" svg:y="16.807cm">
          <draw:text-box>
            <text:p><text:span text:style-name="T10">1</text:span></text:p>
            <text:p><text:span text:style-name="T10">1</text:span></text:p>
          </draw:text-box>
        </draw:frame>
        <draw:frame draw:style-name="gr18" draw:text-style-name="P12" draw:layer="layout" svg:width="0.6cm" svg:height="0.823cm" svg:x="19cm" svg:y="15.607cm">
          <draw:text-box>
            <text:p><text:span text:style-name="T10">2</text:span></text:p>
            <text:p><text:span text:style-name="T10">0</text:span></text:p>
          </draw:text-box>
        </draw:frame>
        <draw:frame draw:style-name="gr18" draw:text-style-name="P12" draw:layer="layout" svg:width="0.6cm" svg:height="0.823cm" svg:x="26.4cm" svg:y="4.802cm">
          <draw:text-box>
            <text:p><text:span text:style-name="T10">2</text:span></text:p>
            <text:p><text:span text:style-name="T10">2</text:span></text:p>
          </draw:text-box>
        </draw:frame>
        <draw:frame draw:style-name="gr18" draw:text-style-name="P12" draw:layer="layout" svg:width="0.6cm" svg:height="0.823cm" svg:x="26.4cm" svg:y="3.602cm">
          <draw:text-box>
            <text:p><text:span text:style-name="T10">2</text:span></text:p>
            <text:p><text:span text:style-name="T10">0</text:span></text:p>
          </draw:text-box>
        </draw:frame>
        <draw:frame draw:style-name="gr18" draw:text-style-name="P12" draw:layer="layout" svg:width="0.6cm" svg:height="0.823cm" svg:x="26.4cm" svg:y="7.203cm">
          <draw:text-box>
            <text:p><text:span text:style-name="T10">2</text:span></text:p>
            <text:p><text:span text:style-name="T10">0</text:span></text:p>
          </draw:text-box>
        </draw:frame>
        <draw:frame draw:style-name="gr18" draw:text-style-name="P12" draw:layer="layout" svg:width="0.6cm" svg:height="0.823cm" svg:x="26.4cm" svg:y="6.003cm">
          <draw:text-box>
            <text:p><text:span text:style-name="T10">2</text:span></text:p>
            <text:p><text:span text:style-name="T10">0</text:span></text:p>
          </draw:text-box>
        </draw:frame>
        <draw:frame draw:style-name="gr18" draw:text-style-name="P12" draw:layer="layout" svg:width="0.6cm" svg:height="0.823cm" svg:x="26.4cm" svg:y="9.604cm">
          <draw:text-box>
            <text:p><text:span text:style-name="T10">4</text:span></text:p>
            <text:p><text:span text:style-name="T10">0</text:span></text:p>
          </draw:text-box>
        </draw:frame>
        <draw:frame draw:style-name="gr18" draw:text-style-name="P12" draw:layer="layout" svg:width="0.6cm" svg:height="0.823cm" svg:x="26.4cm" svg:y="8.404cm">
          <draw:text-box>
            <text:p><text:span text:style-name="T10">1</text:span></text:p>
            <text:p><text:span text:style-name="T10">1</text:span></text:p>
          </draw:text-box>
        </draw:frame>
        <draw:frame draw:style-name="gr18" draw:text-style-name="P12" draw:layer="layout" svg:width="0.6cm" svg:height="0.823cm" svg:x="26.4cm" svg:y="12.005cm">
          <draw:text-box>
            <text:p><text:span text:style-name="T10">1</text:span></text:p>
            <text:p><text:span text:style-name="T10">1</text:span></text:p>
          </draw:text-box>
        </draw:frame>
        <draw:frame draw:style-name="gr18" draw:text-style-name="P12" draw:layer="layout" svg:width="0.6cm" svg:height="0.823cm" svg:x="26.4cm" svg:y="10.805cm">
          <draw:text-box>
            <text:p><text:span text:style-name="T10">2</text:span></text:p>
            <text:p><text:span text:style-name="T10">1</text:span></text:p>
          </draw:text-box>
        </draw:frame>
        <draw:frame draw:style-name="gr18" draw:text-style-name="P12" draw:layer="layout" svg:width="0.6cm" svg:height="0.823cm" svg:x="26.4cm" svg:y="14.406cm">
          <draw:text-box>
            <text:p><text:span text:style-name="T10">2</text:span></text:p>
            <text:p><text:span text:style-name="T10">1</text:span></text:p>
          </draw:text-box>
        </draw:frame>
        <draw:frame draw:style-name="gr18" draw:text-style-name="P12" draw:layer="layout" svg:width="0.6cm" svg:height="0.823cm" svg:x="26.4cm" svg:y="13.206cm">
          <draw:text-box>
            <text:p><text:span text:style-name="T10">4</text:span></text:p>
            <text:p><text:span text:style-name="T10">0</text:span></text:p>
          </draw:text-box>
        </draw:frame>
        <draw:frame draw:style-name="gr18" draw:text-style-name="P12" draw:layer="layout" svg:width="0.6cm" svg:height="0.823cm" svg:x="26.4cm" svg:y="16.807cm">
          <draw:text-box>
            <text:p><text:span text:style-name="T10">2</text:span></text:p>
            <text:p><text:span text:style-name="T10">0</text:span></text:p>
          </draw:text-box>
        </draw:frame>
        <draw:frame draw:style-name="gr18" draw:text-style-name="P12" draw:layer="layout" svg:width="0.6cm" svg:height="0.823cm" svg:x="26.4cm" svg:y="15.607cm">
          <draw:text-box>
            <text:p><text:span text:style-name="T10">0</text:span></text:p>
            <text:p><text:span text:style-name="T10">3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, Bold"/>
    <style:font-face style:name="Calibri1" svg:font-family="Calibri, BoldItalic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" svg:font-family="Times"/>
    <style:font-face style:name="Unknown" svg:font-family="Unknown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V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0.9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6-08T21:40:35.604972286</dc:date>
    <meta:editing-duration>PT1H2M11S</meta:editing-duration>
    <meta:editing-cycles>5</meta:editing-cycles>
    <meta:generator>LibreOffice/24.2.7.2$Linux_X86_64 LibreOffice_project/420$Build-2</meta:generator>
    <meta:document-statistic meta:object-count="296"/>
  </office:meta>
</office:document-meta>
</file>